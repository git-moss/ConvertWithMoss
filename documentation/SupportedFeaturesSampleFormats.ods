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3" table:default-cell-style-name="ce69"/>
        <table:table-column table:style-name="co6" table:default-cell-style-name="ce69"/>
        <table:table-column table:style-name="co6" table:default-cell-style-name="ce69"/>
        <table:table-column table:style-name="co14" table:default-cell-style-name="ce69"/>
        <table:table-column table:style-name="co1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6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default-cell-style-name="ce69"/>
        <table:table-column table:style-name="co6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3">
            <text:p>LFO (Vibrato)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72"/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6"/>
          <table:table-cell table:style-name="ce72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79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72"/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23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72"/>
          <table:table-cell table:style-name="ce7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6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Pad exclusive group</text:p>
          </table:table-cell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13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6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6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6" office:value-type="string" calcext:value-type="string">
            <text:p>TODO unknown where </text:p>
            <text:p>stor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72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6" office:value-type="string" calcext:value-type="string">
            <text:p>TODO unknown where </text:p>
            <text:p>stored</text:p>
          </table:table-cell>
          <table:table-cell table:style-name="ce26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23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13" office:value-type="string" calcext:value-type="string">
            <text:p>Key to volume</text:p>
          </table:table-cell>
          <table:table-cell table:style-name="ce13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72"/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13" office:value-type="string" calcext:value-type="string">
            <text:p>Group volume / pan / tuning</text:p>
          </table:table-cell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72"/>
          <table:table-cell table:style-name="ce13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3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6" office:value-type="string" calcext:value-type="string">
            <text:p>CONN_SRC_PITCHWHEEL → CONN_DST_PITCH</text:p>
          </table:table-cell>
          <table:table-cell table:style-name="ce26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72"/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4"/>
          <table:table-cell table:style-name="ce21"/>
          <table:covered-table-cell table:number-columns-repeated="7" table:style-name="ce4"/>
        </table:table-row>
        <table:table-row table:style-name="ro2">
          <table:table-cell table:style-name="ce3">
            <text:p>Downloadable Sounds</text:p>
          </table:table-cell>
          <table:table-cell table:style-name="ce68">
            <text:p>Read</text:p>
          </table:table-cell>
          <table:table-cell table:style-name="ce10">
            <text:p>dls</text:p>
          </table:table-cell>
          <table:table-cell table:style-name="ce10">
            <text:p>dls</text:p>
          </table:table-cell>
          <table:table-cell table:style-name="ce72"/>
          <table:table-cell table:style-name="ce21">
            <text:p>8, 16</text:p>
          </table:table-cell>
          <table:table-cell table:style-name="ce10">
            <text:p>All</text:p>
          </table:table-cell>
          <table:table-cell table:style-name="ce4"/>
          <table:table-cell table:style-name="ce5"/>
          <table:table-cell table:style-name="ce10">
            <text:p>INFO: INAM</text:p>
          </table:table-cell>
          <table:table-cell table:style-name="ce21">
            <text:p>from description</text:p>
          </table:table-cell>
          <table:table-cell table:style-name="ce10">
            <text:p>INFO: IENG</text:p>
          </table:table-cell>
          <table:table-cell table:style-name="ce10">
            <text:p>INFO: ICRD</text:p>
          </table:table-cell>
          <table:table-cell table:style-name="ce10">
            <text:p>INFO: ISBJ / ICMT</text:p>
          </table:table-cell>
          <table:table-cell table:style-name="ce72"/>
          <table:table-cell table:style-name="ce81"/>
          <table:table-cell table:style-name="ce5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10">
            <text:p>wave link</text:p>
          </table:table-cell>
          <table:table-cell table:style-name="ce10">
            <text:p>usUnityNote</text:p>
          </table:table-cell>
          <table:table-cell table:style-name="ce10">
            <text:p>region key range</text:p>
          </table:table-cell>
          <table:table-cell table:style-name="ce72"/>
          <table:table-cell table:style-name="ce10">
            <text:p>region velocity range</text:p>
          </table:table-cell>
          <table:table-cell table:style-name="ce72"/>
          <table:table-cell table:style-name="ce72"/>
          <table:table-cell table:style-name="ce72"/>
          <table:table-cell table:style-name="ce10">
            <text:p>fine tune / pitch conn.</text:p>
          </table:table-cell>
          <table:table-cell table:style-name="ce72"/>
          <table:table-cell table:style-name="ce72"/>
          <table:table-cell table:style-name="ce10">
            <text:p>region gain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13">
            <text:p>usKeyGroup</text:p>
          </table:table-cell>
          <table:table-cell table:style-name="ce82"/>
          <table:table-cell table:style-name="ce5">
            <text:p>wsmp</text:p>
          </table:table-cell>
          <table:table-cell table:style-name="ce21">
            <text:p>forwards only</text:p>
          </table:table-cell>
          <table:table-cell table:style-name="ce72"/>
          <table:table-cell table:style-name="ce10">
            <text:p>loop start</text:p>
          </table:table-cell>
          <table:table-cell table:style-name="ce10">
            <text:p>loop length</text:p>
          </table:table-cell>
          <table:table-cell table:style-name="ce72"/>
          <table:table-cell table:style-name="ce72"/>
          <table:table-cell table:style-name="ce81"/>
          <table:table-cell table:style-name="ce5"/>
          <table:table-cell table:style-name="ce10">
            <text:p>EG1: delay, attack, hold,</text:p>
            <text:p>decay, sustain, release</text:p>
          </table:table-cell>
          <table:table-cell table:style-name="ce72"/>
          <table:table-cell table:style-name="ce10">
            <text:p>velocity -&gt; EG1</text:p>
          </table:table-cell>
          <table:table-cell table:style-name="ce13">
            <text:p>keynumber -&gt; gain</text:p>
          </table:table-cell>
          <table:table-cell table:style-name="ce72"/>
          <table:table-cell table:style-name="ce4"/>
          <table:table-cell table:style-name="ce5"/>
          <table:table-cell table:style-name="ce10">
            <text:p>pitchwheel -&gt; pitch</text:p>
          </table:table-cell>
          <table:table-cell table:style-name="ce10">
            <text:p>pitchwheel -&gt; pitch</text:p>
          </table:table-cell>
          <table:table-cell table:style-name="ce10">
            <text:p>EG2 -&gt; pitch</text:p>
          </table:table-cell>
          <table:table-cell table:style-name="ce13">
            <text:p>LFO -&gt; pitch</text:p>
            <text:p>(Hz, delay, depth)</text:p>
          </table:table-cell>
          <table:table-cell table:style-name="ce4"/>
          <table:table-cell table:style-name="ce2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72"/>
          <table:table-cell table:style-name="ce72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6"/>
          <table:table-cell table:style-name="ce72"/>
          <table:table-cell table:style-name="ce26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6" office:value-type="string" calcext:value-type="string">
            <text:p>velocity</text:p>
          </table:table-cell>
          <table:table-cell table:style-name="ce72"/>
          <table:table-cell table:style-name="ce13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23"/>
          <table:table-cell table:number-columns-repeated="2" table:style-name="ce26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6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3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3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3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13" office:value-type="string" calcext:value-type="string">
            <text:p>Volume key scale</text:p>
          </table:table-cell>
          <table:table-cell table:style-name="ce13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20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26" office:value-type="string" calcext:value-type="string">
            <text:p>from tuning</text:p>
          </table:table-cell>
          <table:table-cell table:style-name="ce26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6"/>
          <table:table-cell table:style-name="ce72"/>
          <table:table-cell table:style-name="ce72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7"/>
          <table:table-cell table:style-name="ce23" table:number-columns-repeated="3"/>
          <table:table-cell table:style-name="ce72"/>
          <table:table-cell table:style-name="ce72"/>
          <table:table-cell table:style-name="ce87"/>
          <table:table-cell table:style-name="ce23" table:number-columns-repeated="6"/>
          <table:table-cell table:style-name="ce20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3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3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>
            <text:p>Keymap velocity levels</text:p>
          </table:table-cell>
          <table:table-cell table:style-name="ce13" office:value-type="string" calcext:value-type="string">
            <text:p>Keymap name (+ level range)</text:p>
          </table:table-cell>
          <table:table-cell table:style-name="ce23" table:number-columns-spanned="1" table:number-rows-spanned="2"/>
          <table:table-cell table:style-name="ce81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3" office:value-type="string" calcext:value-type="string">
            <text:p>Keymap entries + layer</text:p>
            <text:p>LoKey / HiKey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Dynamic levels (8 × 16)</text:p>
          </table:table-cell>
          <table:table-cell table:style-name="ce23" table:number-columns-spanned="1" table:number-rows-spanned="2"/>
          <table:table-cell table:style-name="ce23"/>
          <table:table-cell table:style-name="ce23"/>
          <table:table-cell table:style-name="ce13" office:value-type="string" calcext:value-type="string">
            <text:p>Entry tuning (cents) +</text:p>
            <text:p>layer transpose</text:p>
          </table:table-cell>
          <table:table-cell table:style-name="ce23"/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3" office:value-type="string" calcext:value-type="string">
            <text:p>Sample end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1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7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3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23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1"/>
          <table:table-cell table:style-name="ce13" office:value-type="string" calcext:value-type="string">
            <text:p>8 dynamic levels</text:p>
          </table:table-cell>
          <table:table-cell table:style-name="ce23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3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style-name="ce21" office:value-type="string" calcext:value-type="string">
            <text:p>Baked into the sample data</text:p>
          </table:table-cell>
          <table:table-cell table:style-name="ce21" office:value-type="string" calcext:value-type="string">
            <text:p>Baked into the sample data</text:p>
          </table:table-cell>
          <table:table-cell table:style-name="ce13" office:value-type="string" calcext:value-type="string">
            <text:p>Entry tuning (cents)</text:p>
          </table:table-cell>
          <table:table-cell table:style-name="ce13" office:value-type="string" calcext:value-type="string">
            <text:p>Baked into the entry tuning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style-name="ce4"/>
          <table:covered-table-cell table:style-name="ce4"/>
          <table:table-cell table:style-name="ce81"/>
          <table:table-cell table:style-name="ce72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3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/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72"/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/>
          <table:table-cell table:style-name="ce72"/>
          <table:table-cell table:style-name="ce4"/>
          <table:table-cell table:style-name="ce21"/>
          <table:covered-table-cell table:number-columns-repeated="3" table:style-name="ce4"/>
          <table:table-cell table:style-name="ce72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3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/>
          <table:table-cell table:style-name="ce7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72"/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/>
          <table:table-cell table:style-name="ce7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table-cell table:style-name="ce7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 table:number-columns-repeated="3"/>
          <table:covered-table-cell table:style-name="ce4"/>
          <table:table-cell table:style-name="ce72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1" office:value-type="string" calcext:value-type="string">
            <text:p>TVA Velocity Curve</text:p>
          </table:table-cell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13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2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6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13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1" office:value-type="string" calcext:value-type="string">
            <text:p>Velocity Curve Type</text:p>
          </table:table-cell>
          <table:table-cell table:style-name="ce13" office:value-type="string" calcext:value-type="string">
            <text:p>TVA level key follow</text:p>
          </table:table-cell>
          <table:table-cell table:style-name="ce13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/>
          <table:table-cell table:style-name="ce21" office:value-type="string" calcext:value-type="string">
            <text:p>Partial velocity range (up to 4 layers)</text:p>
          </table:table-cell>
          <table:table-cell table:style-name="ce23" table:number-columns-repeated="2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23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13">
            <text:p>pitchlfo_freq, pitchlfo_depth,</text:p>
            <text:p>pitchlfo_delay, pitchlfo_fad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13">
            <text:p>pitchlfo_freq, pitchlfo_depth,</text:p>
            <text:p>pitchlfo_delay, pitchlfo_fade</text:p>
          </table:table-cell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23"/>
          <table:table-cell table:style-name="ce16" table:number-columns-spanned="1" table:number-rows-spanned="2"/>
          <table:table-cell table:style-name="ce13" office:value-type="string" calcext:value-type="string">
            <text:p>All (FLAC, WAV, AIF)</text:p>
          </table:table-cell>
          <table:table-cell table:style-name="ce13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3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3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3" office:value-type="string" calcext:value-type="string">
            <text:p>Entry tune (±125 cents) +</text:p>
            <text:p>partial Tune / Tran / Octav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3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3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23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7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3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3" office:value-type="string" calcext:value-type="string">
            <text:p>Category as the first #tag</text:p>
            <text:p>(mapped to the Regen tag list)</text:p>
          </table:table-cell>
          <table:table-cell table:style-name="ce23"/>
          <table:covered-table-cell table:style-name="ce4"/>
          <table:table-cell table:style-name="ce13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style-name="ce4"/>
          <table:covered-table-cell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3" office:value-type="string" calcext:value-type="string">
            <text:p>Entry tune (±125 cents) +</text:p>
            <text:p>partial Tran</text:p>
          </table:table-cell>
          <table:covered-table-cell table:style-name="ce4"/>
          <table:covered-table-cell table:style-name="ce4"/>
          <table:table-cell table:style-name="ce13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7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23"/>
          <table:table-cell table:style-name="ce21"/>
          <table:covered-table-cell table:style-name="ce4"/>
          <table:table-cell table:style-name="ce81"/>
          <table:table-cell table:style-name="ce72"/>
          <table:table-cell table:style-name="ce23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72"/>
          <table:table-cell table:number-columns-repeated="2"/>
          <table:table-cell table:style-name="ce67" table:number-columns-repeated="16323"/>
        </table:table-row>
        <table:table-row table:style-name="ro4" table:number-rows-repeated="1048500">
          <table:table-cell table:number-columns-repeated="59"/>
          <table:table-cell table:style-name="ce72"/>
          <table:table-cell table:number-columns-repeated="2"/>
          <table:table-cell table:style-name="ce67" table:number-columns-repeated="16323"/>
        </table:table-row>
        <table:table-row table:style-name="ro4">
          <table:table-cell table:number-columns-repeated="59"/>
          <table:table-cell table:style-name="ce72"/>
          <table:table-cell table:number-columns-repeated="2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10:38:11.33352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8T10:52:00.672729500</dc:date>
    <meta:editing-cycles>964</meta:editing-cycles>
    <meta:editing-duration>P1DT13H34M58S</meta:editing-duration>
    <meta:generator>LibreOffice/26.2.4.2$Windows_X86_64 LibreOffice_project/0229ac93fcf0d7cbc6376066c6f35021cef002dc</meta:generator>
    <meta:document-statistic meta:table-count="1" meta:cell-count="1534" meta:object-count="0"/>
  </office:meta>
</office:document-meta>
</file>