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769cm" fo:break-before="auto" style:use-optimal-row-height="false"/>
    </style:style>
    <style:style style:name="ro11" style:family="table-row">
      <style:table-row-properties style:row-height="0.707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94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ns42:value-type="string">
            <text:p>Preset</text:p>
          </table:table-cell>
          <table:table-cell table:style-name="ce6" office:value-type="string" ns42:value-type="string">
            <text:p>Library</text:p>
          </table:table-cell>
          <table:table-cell table:style-name="ce6" office:value-type="string" ns42:value-type="string">
            <text:p>Multi</text:p>
          </table:table-cell>
          <table:table-cell table:style-name="ce6" office:value-type="string" ns42:value-type="string">
            <text:p>Bit-Depths</text:p>
          </table:table-cell>
          <table:table-cell table:style-name="ce6" office:value-type="string" ns42:value-type="string">
            <text:p>Frequencies</text:p>
          </table:table-cell>
          <table:table-cell table:style-name="ce18"/>
          <table:table-cell table:style-name="ce6" office:value-type="string" ns42:value-type="string">
            <text:p>Metadata</text:p>
          </table:table-cell>
          <table:table-cell table:style-name="ce6" office:value-type="string" ns42:value-type="string">
            <text:p>name</text:p>
          </table:table-cell>
          <table:table-cell table:style-name="ce6" office:value-type="string" ns42:value-type="string">
            <text:p>category</text:p>
          </table:table-cell>
          <table:table-cell table:style-name="ce6" office:value-type="string" ns42:value-type="string">
            <text:p>creator</text:p>
          </table:table-cell>
          <table:table-cell table:style-name="ce6" office:value-type="string" ns42:value-type="string">
            <text:p>creation</text:p>
          </table:table-cell>
          <table:table-cell table:style-name="ce3" office:value-type="string" ns42:value-type="string">
            <text:p>description</text:p>
          </table:table-cell>
          <table:table-cell table:style-name="ce6" office:value-type="string" ns42:value-type="string">
            <text:p>keywords</text:p>
          </table:table-cell>
          <table:table-cell table:style-name="ce22"/>
          <table:table-cell table:style-name="ce3" office:value-type="string" ns42:value-type="string">
            <text:p>Group</text:p>
          </table:table-cell>
          <table:table-cell table:style-name="ce3" office:value-type="string" ns42:value-type="string">
            <text:p>name</text:p>
          </table:table-cell>
          <table:table-cell table:style-name="ce22"/>
          <table:table-cell table:style-name="ce6" office:value-type="string" ns42:value-type="string">
            <text:p>Sample</text:p>
          </table:table-cell>
          <table:table-cell table:style-name="ce3" office:value-type="string" ns42:value-type="string">
            <text:p>root-key</text:p>
          </table:table-cell>
          <table:table-cell table:style-name="ce3" office:value-type="string" ns42:value-type="string">
            <text:p>key-range</text:p>
          </table:table-cell>
          <table:table-cell table:style-name="ce3" office:value-type="string" ns42:value-type="string">
            <text:p>key-fade</text:p>
          </table:table-cell>
          <table:table-cell table:style-name="ce3" office:value-type="string" ns42:value-type="string">
            <text:p>velocity-range</text:p>
          </table:table-cell>
          <table:table-cell table:style-name="ce3" office:value-type="string" ns42:value-type="string">
            <text:p>velocity-fade</text:p>
          </table:table-cell>
          <table:table-cell table:style-name="ce3" office:value-type="string" ns42:value-type="string">
            <text:p>play-start</text:p>
          </table:table-cell>
          <table:table-cell table:style-name="ce3" office:value-type="string" ns42:value-type="string">
            <text:p>play-end</text:p>
          </table:table-cell>
          <table:table-cell table:style-name="ce3" office:value-type="string" ns42:value-type="string">
            <text:p>pitch</text:p>
          </table:table-cell>
          <table:table-cell table:style-name="ce3" office:value-type="string" ns42:value-type="string">
            <text:p>key track</text:p>
          </table:table-cell>
          <table:table-cell table:style-name="ce3" office:value-type="string" ns42:value-type="string">
            <text:p>direction</text:p>
          </table:table-cell>
          <table:table-cell table:style-name="ce3" office:value-type="string" ns42:value-type="string">
            <text:p>gain</text:p>
          </table:table-cell>
          <table:table-cell table:style-name="ce3" office:value-type="string" ns42:value-type="string">
            <text:p>panning</text:p>
          </table:table-cell>
          <table:table-cell table:style-name="ce3" office:value-type="string" ns42:value-type="string">
            <text:p>play logic</text:p>
          </table:table-cell>
          <table:table-cell table:style-name="ce3" office:value-type="string" ns42:value-type="string">
            <text:p>trigger</text:p>
          </table:table-cell>
          <table:table-cell table:style-name="ce22"/>
          <table:table-cell table:style-name="ce3" office:value-type="string" ns42:value-type="string">
            <text:p>Loop</text:p>
          </table:table-cell>
          <table:table-cell table:style-name="ce3" office:value-type="string" ns42:value-type="string">
            <text:p>type</text:p>
          </table:table-cell>
          <table:table-cell table:style-name="ce3" office:value-type="string" ns42:value-type="string">
            <text:p>loop until release / sustain loop</text:p>
          </table:table-cell>
          <table:table-cell table:style-name="ce3" office:value-type="string" ns42:value-type="string">
            <text:p>start</text:p>
          </table:table-cell>
          <table:table-cell table:style-name="ce3" office:value-type="string" ns42:value-type="string">
            <text:p>end</text:p>
          </table:table-cell>
          <table:table-cell table:style-name="ce3" office:value-type="string" ns42:value-type="string">
            <text:p>crossfade</text:p>
          </table:table-cell>
          <table:table-cell table:style-name="ce3" office:value-type="string" ns42:value-type="string">
            <text:p>tuning</text:p>
          </table:table-cell>
          <table:table-cell table:style-name="ce18"/>
          <table:table-cell table:style-name="ce3" office:value-type="string" ns42:value-type="string">
            <text:p>Amplitude</text:p>
          </table:table-cell>
          <table:table-cell table:style-name="ce3" office:value-type="string" ns42:value-type="string">
            <text:p>Envelope</text:p>
          </table:table-cell>
          <table:table-cell table:style-name="ce3" office:value-type="string" ns42:value-type="string">
            <text:p>Envelope Slope</text:p>
          </table:table-cell>
          <table:table-cell table:style-name="ce3" office:value-type="string" ns42:value-type="string">
            <text:p>Velocity Mod.</text:p>
          </table:table-cell>
          <table:table-cell table:style-name="ce31"/>
          <table:table-cell table:style-name="ce3" office:value-type="string" ns42:value-type="string">
            <text:p>Pitch</text:p>
          </table:table-cell>
          <table:table-cell table:style-name="ce3" office:value-type="string" ns42:value-type="string">
            <text:p>Bend Up</text:p>
          </table:table-cell>
          <table:table-cell table:style-name="ce3" office:value-type="string" ns42:value-type="string">
            <text:p>Bend Down</text:p>
          </table:table-cell>
          <table:table-cell table:style-name="ce3" office:value-type="string" ns42:value-type="string">
            <text:p>Envelope</text:p>
          </table:table-cell>
          <table:table-cell table:style-name="ce18"/>
          <table:table-cell table:style-name="ce3" office:value-type="string" ns42:value-type="string">
            <text:p>Filter</text:p>
          </table:table-cell>
          <table:table-cell table:style-name="ce3" office:value-type="string" ns42:value-type="string">
            <text:p>Type</text:p>
          </table:table-cell>
          <table:table-cell table:style-name="ce3" office:value-type="string" ns42:value-type="string">
            <text:p>Poles</text:p>
          </table:table-cell>
          <table:table-cell table:style-name="ce3" office:value-type="string" ns42:value-type="string">
            <text:p>Cutoff</text:p>
          </table:table-cell>
          <table:table-cell table:style-name="ce3" office:value-type="string" ns42:value-type="string">
            <text:p>Resonance</text:p>
          </table:table-cell>
          <table:table-cell table:style-name="ce3" office:value-type="string" ns42:value-type="string">
            <text:p>Envelope</text:p>
          </table:table-cell>
          <table:table-cell table:style-name="ce3" office:value-type="string" ns42:value-type="string">
            <text:p><text:span text:style-name="T1">Cutoff </text:span>Velocity Mod.</text:p>
          </table:table-cell>
          <table:table-cell table:style-name="ce3" office:value-type="string" ns42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1010music bento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ns42:value-type="string" table:number-columns-spanned="1" table:number-rows-spanned="2">
            <text:p>preset.xml (up to 8 instruments)</text:p>
          </table:table-cell>
          <table:table-cell table:style-name="ce17" office:value-type="string" ns42:value-type="string">
            <text:p>16, 24, 32</text:p>
          </table:table-cell>
          <table:table-cell table:style-name="ce17" office:value-type="string" ns42:value-type="string">
            <text:p>Up to 48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ns42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ns42:value-type="string" table:number-columns-spanned="1" table:number-rows-spanned="2">
            <text:p>direction (only global)</text:p>
          </table:table-cell>
          <table:table-cell table:style-name="ce79" office:value-type="string" ns42:value-type="string" table:number-columns-spanned="1" table:number-rows-spanned="2">
            <text:p>gaindb (only global)</text:p>
          </table:table-cell>
          <table:table-cell table:style-name="ce79" office:value-type="string" ns42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ns42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ample Chunk: start</text:p>
          </table:table-cell>
          <table:table-cell table:style-name="ce11" office:value-type="string" ns42:value-type="string" table:number-columns-spanned="1" table:number-rows-spanned="2">
            <text:p>Sample Chunk: end</text:p>
          </table:table-cell>
          <table:table-cell table:style-name="ce79" office:value-type="string" ns42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ns42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ns42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dualfilcutoff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1010music blackbox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ns42:value-type="string" table:number-columns-spanned="1" table:number-rows-spanned="2">
            <text:p>preset.xml (up to 16 instruments)</text:p>
          </table:table-cell>
          <table:table-cell table:style-name="ce17" office:value-type="string" ns42:value-type="string">
            <text:p>16, 24, 32</text:p>
          </table:table-cell>
          <table:table-cell table:style-name="ce17" office:value-type="string" ns42:value-type="string">
            <text:p>Up to 48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opstart</text:p>
          </table:table-cell>
          <table:table-cell table:style-name="ce11" office:value-type="string" ns42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ns42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ns42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dualfilcutoff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Ableton ADV/ADG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</text:p>
          </table:table-cell>
          <table:table-cell table:style-name="ce4"/>
          <table:table-cell table:style-name="ce17"/>
          <table:table-cell table:style-name="ce5" office:value-type="string" ns42:value-type="string">
            <text:p>UserName</text:p>
          </table:table-cell>
          <table:table-cell table:style-name="ce79" office:value-type="string" ns42:value-type="string">
            <text:p>from filename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Key</text:p>
          </table:table-cell>
          <table:table-cell table:style-name="ce11" office:value-type="string" ns42:value-type="string" table:number-columns-spanned="1" table:number-rows-spanned="2">
            <text:p>KeyRange – Min/Max</text:p>
          </table:table-cell>
          <table:table-cell table:style-name="ce11" office:value-type="string" ns42:value-type="string" table:number-columns-spanned="1" table:number-rows-spanned="2">
            <text:p>KeyRange – CrossfadeMin/Max</text:p>
          </table:table-cell>
          <table:table-cell table:style-name="ce11" office:value-type="string" ns42:value-type="string" table:number-columns-spanned="1" table:number-rows-spanned="2">
            <text:p>VelocityRange – Min/Max</text:p>
          </table:table-cell>
          <table:table-cell table:style-name="ce11" office:value-type="string" ns42:value-type="string" table:number-columns-spanned="1" table:number-rows-spanned="2">
            <text:p>VelocityRange – CrossfadeMin/Max</text:p>
          </table:table-cell>
          <table:table-cell table:style-name="ce11" office:value-type="string" ns42:value-type="string" table:number-columns-spanned="1" table:number-rows-spanned="2">
            <text:p>SampleStart</text:p>
          </table:table-cell>
          <table:table-cell table:style-name="ce11" office:value-type="string" ns42:value-type="string" table:number-columns-spanned="1" table:number-rows-spanned="2">
            <text:p>SampleEnd</text:p>
          </table:table-cell>
          <table:table-cell table:style-name="ce11" office:value-type="string" ns42:value-type="string" table:number-columns-spanned="1" table:number-rows-spanned="2">
            <text:p>RootKey + Detune</text:p>
          </table:table-cell>
          <table:table-cell table:style-name="ce11" office:value-type="string" ns42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orama</text:p>
          </table:table-cell>
          <table:table-cell table:style-name="ce79" office:value-type="string" ns42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Sustain loop</text:p>
          </table:table-cell>
          <table:table-cell table:style-name="ce11" office:value-type="string" ns42:value-type="string" table:number-columns-spanned="1" table:number-rows-spanned="2">
            <text:p>Mode</text:p>
          </table:table-cell>
          <table:table-cell table:style-name="ce10" office:value-type="string" ns42:value-type="string">
            <text:p>Release Mode: On</text:p>
          </table:table-cell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Crossfade</text:p>
          </table:table-cell>
          <table:table-cell table:style-name="ce11" office:value-type="string" ns42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ns42:value-type="string" table:number-columns-spanned="1" table:number-rows-spanned="2">
            <text:p>AttackSlope, DecaySlope, ReleaseSlope</text:p>
          </table:table-cell>
          <table:table-cell table:style-name="ce79" office:value-type="string" ns42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ns42:value-type="string" table:number-columns-spanned="1" table:number-rows-spanned="2">
            <text:p>PitchBendRange</text:p>
          </table:table-cell>
          <table:table-cell table:style-name="ce79" office:value-type="string" ns42:value-type="string" table:number-columns-spanned="1" table:number-rows-spanned="2">
            <text:p>PitchBendRange</text:p>
          </table:table-cell>
          <table:table-cell table:style-name="ce11" office:value-type="string" ns42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ns42:value-type="string" table:number-columns-spanned="1" table:number-rows-spanned="2">
            <text:p>Only Global</text:p>
          </table:table-cell>
          <table:table-cell table:style-name="ce11" office:value-type="string" ns42:value-type="string" table:number-columns-spanned="1" table:number-rows-spanned="2">
            <text:p>Type: Lowpass / Highpass / Bandpass / Notch</text:p>
          </table:table-cell>
          <table:table-cell table:style-name="ce11" office:value-type="string" ns42:value-type="string" table:number-columns-spanned="1" table:number-rows-spanned="2">
            <text:p>Slope: 12 / 24</text:p>
          </table:table-cell>
          <table:table-cell table:style-name="ce11" office:value-type="string" ns42:value-type="string" table:number-columns-spanned="1" table:number-rows-spanned="2">
            <text:p>Freq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11" office:value-type="string" ns42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ns42:value-type="string" table:number-columns-spanned="1" table:number-rows-spanned="2">
            <text:p>ModByVelocity (global)</text:p>
          </table:table-cell>
          <table:table-cell table:style-name="ce79" office:value-type="string" ns42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table-cell table:style-name="ce10" office:value-type="string" ns42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IFF</text:p>
          </table:table-cell>
          <table:table-cell table:style-name="ce68" office:value-type="string" ns42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ns42:value-type="string">
            <text:p>All</text:p>
          </table:table-cell>
          <table:table-cell table:style-name="ce4"/>
          <table:table-cell table:style-name="ce17"/>
          <table:table-cell table:style-name="ce5" office:value-type="string" ns42:value-type="string">
            <text:p>Name Chunk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Author Chunk</text:p>
          </table:table-cell>
          <table:table-cell table:style-name="ce79" office:value-type="string" ns42:value-type="string">
            <text:p>Creation / modification date of file</text:p>
          </table:table-cell>
          <table:table-cell table:style-name="ce5" office:value-type="string" ns42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Instrument Chunk</text:p>
          </table:table-cell>
          <table:table-cell table:style-name="ce10" office:value-type="string" ns42:value-type="string">
            <text:p>base note</text:p>
          </table:table-cell>
          <table:table-cell table:style-name="ce10" office:value-type="string" ns42:value-type="string">
            <text:p>low / high note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 table:number-columns-repeated="3"/>
          <table:table-cell table:style-name="ce10" office:value-type="string" ns42:value-type="string">
            <text:p>detune</text:p>
          </table:table-cell>
          <table:table-cell table:style-name="ce72" table:number-columns-repeated="2"/>
          <table:table-cell table:style-name="ce10" office:value-type="string" ns42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ns42:value-type="string">
            <text:p>sustain loop</text:p>
          </table:table-cell>
          <table:table-cell table:style-name="ce10" office:value-type="string" ns42:value-type="string">
            <text:p>play mode</text:p>
          </table:table-cell>
          <table:table-cell table:style-name="ce23"/>
          <table:table-cell table:style-name="ce10" office:value-type="string" ns42:value-type="string">
            <text:p>begin loop marker</text:p>
          </table:table-cell>
          <table:table-cell table:style-name="ce10" office:value-type="string" ns42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AKP/AKM</text:p>
            <text:p>(S5000/S6000/Z4/Z8/MPC4000)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AKP / AKM</text:p>
          </table:table-cell>
          <table:table-cell table:style-name="ce72"/>
          <table:table-cell table:style-name="ce10" office:value-type="string" ns42:value-type="string">
            <text:p>AKM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79" office:value-type="string" ns42:value-type="string">
            <text:p>from filename</text:p>
          </table:table-cell>
          <table:table-cell table:style-name="ce72"/>
          <table:table-cell table:style-name="ce79" office:value-type="string" ns42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ns42:value-type="string">
            <text:p>Sample Chunk: root note</text:p>
          </table:table-cell>
          <table:table-cell table:style-name="ce10" office:value-type="string" ns42:value-type="string">
            <text:p>low / high note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 table:number-columns-repeated="3"/>
          <table:table-cell table:style-name="ce10" office:value-type="string" ns42:value-type="string">
            <text:p>semitone-tune / fine tune</text:p>
          </table:table-cell>
          <table:table-cell table:style-name="ce72" table:number-columns-repeated="2"/>
          <table:table-cell table:style-name="ce10" office:value-type="string" ns42:value-type="string">
            <text:p>(relative) gain</text:p>
          </table:table-cell>
          <table:table-cell table:style-name="ce10" office:value-type="string" ns42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ns42:value-type="string">
            <text:p>sustain loop</text:p>
          </table:table-cell>
          <table:table-cell table:style-name="ce23" table:number-columns-repeated="2"/>
          <table:table-cell table:style-name="ce10" office:value-type="string" ns42:value-type="string">
            <text:p>Sample Chunk</text:p>
          </table:table-cell>
          <table:table-cell table:style-name="ce10" office:value-type="string" ns42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ns42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ns42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ns42:value-type="string">
            <text:p>Lowpass, highpass, notch, bandpass</text:p>
          </table:table-cell>
          <table:table-cell table:style-name="ce10" office:value-type="string" ns42:value-type="string">
            <text:p>1, 2, 4 (depending on type)</text:p>
          </table:table-cell>
          <table:table-cell table:style-name="ce10" table:number-columns-repeated="2"/>
          <table:table-cell table:style-name="ce10" office:value-type="string" ns42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Akai MPC / Force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ns42:value-type="string" table:number-columns-spanned="1" table:number-rows-spanned="2">
            <text:p>TODO XPJ v3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Layer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Start</text:p>
          </table:table-cell>
          <table:table-cell table:style-name="ce11" office:value-type="string" ns42:value-type="string" table:number-columns-spanned="1" table:number-rows-spanned="2">
            <text:p>SliceEnd</text:p>
          </table:table-cell>
          <table:table-cell table:style-name="ce11" office:value-type="string" ns42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Loop</text:p>
          </table:table-cell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ZonePlay</text:p>
          </table:table-cell>
          <table:table-cell table:style-name="ce11" office:value-type="string" ns42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ns42:value-type="string" table:number-columns-spanned="1" table:number-rows-spanned="2">
            <text:p>VolumeAttackCurve, VolumeDecayCurve, VolumeReleaseCurve</text:p>
          </table:table-cell>
          <table:table-cell table:style-name="ce11" office:value-type="string" ns42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ns42:value-type="string" table:number-columns-spanned="1" table:number-rows-spanned="2">
            <text:p>KeygroupPitchBendRange</text:p>
          </table:table-cell>
          <table:table-cell table:style-name="ce5" office:value-type="string" ns42:value-type="string" table:number-columns-spanned="1" table:number-rows-spanned="2">
            <text:p>KeygroupPitchBendRange</text:p>
          </table:table-cell>
          <table:table-cell table:style-name="ce11" office:value-type="string" ns42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ns42:value-type="string" table:number-columns-spanned="1" table:number-rows-spanned="2">
            <text:p>Lowpass, Highpass, Bandpass, Bandstop</text:p>
          </table:table-cell>
          <table:table-cell table:style-name="ce5" office:value-type="string" ns42:value-type="string" table:number-columns-spanned="1" table:number-rows-spanned="2">
            <text:p>1, 2, 4, 6, 8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FilterEnvAmt, FilterAttack,…</text:p>
          </table:table-cell>
          <table:table-cell table:style-name="ce11" office:value-type="string" ns42:value-type="string" table:number-columns-spanned="1" table:number-rows-spanned="2">
            <text:p>VelocityToFilter</text:p>
          </table:table-cell>
          <table:table-cell table:style-name="ce11" office:value-type="string" ns42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MPC60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ns42:value-type="float">
            <text:p>12</text:p>
          </table:table-cell>
          <table:table-cell table:style-name="ce17" office:value-type="string" ns42:value-type="string">
            <text:p>Up to 40kHz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2" table:number-columns-repeated="2"/>
          <table:table-cell table:style-name="ce79" office:value-type="string" ns42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Pad</text:p>
          </table:table-cell>
          <table:table-cell table:style-name="ce23"/>
          <table:table-cell table:style-name="ce20" office:value-type="string" ns42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ns42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ns42:value-type="string">
            <text:p>Start</text:p>
          </table:table-cell>
          <table:table-cell table:number-columns-repeated="2" table:style-name="ce23" office:value-type="string" ns42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ns42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ns42:value-type="string">
            <text:p>Attack, Decay (TODO)</text:p>
          </table:table-cell>
          <table:table-cell table:style-name="ce23"/>
          <table:table-cell table:style-name="ce23" office:value-type="string" ns42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MPC500/1000/2500</text:p>
            <text:p/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BEXT chunk: originator</text:p>
          </table:table-cell>
          <table:table-cell table:style-name="ce10" office:value-type="string" ns42:value-type="string">
            <text:p>BEXT chunk: originationDate/Time</text:p>
          </table:table-cell>
          <table:table-cell table:style-name="ce10" office:value-type="string" ns42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Pad</text:p>
          </table:table-cell>
          <table:table-cell table:style-name="ce10" office:value-type="string" ns42:value-type="string">
            <text:p>from WAV</text:p>
          </table:table-cell>
          <table:table-cell table:style-name="ce10" office:value-type="string" ns42:value-type="string">
            <text:p>1 MIDI Note</text:p>
          </table:table-cell>
          <table:table-cell table:style-name="ce23"/>
          <table:table-cell table:style-name="ce10" office:value-type="string" ns42:value-type="string">
            <text:p>range lower / ranger higher</text:p>
          </table:table-cell>
          <table:table-cell table:style-name="ce23" table:number-columns-repeated="3"/>
          <table:table-cell table:style-name="ce10" office:value-type="string" ns42:value-type="string">
            <text:p>Tuning</text:p>
          </table:table-cell>
          <table:table-cell table:style-name="ce23" table:number-columns-repeated="2"/>
          <table:table-cell table:style-name="ce10" office:value-type="string" ns42:value-type="string">
            <text:p><text:span text:style-name="T2">Mixer </text:span> Volume + Sample Volume</text:p>
          </table:table-cell>
          <table:table-cell table:style-name="ce10" office:value-type="string" ns42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ns42:value-type="string">
            <text:p>Start (WAV)</text:p>
          </table:table-cell>
          <table:table-cell table:style-name="ce5" office:value-type="string" ns42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ns42:value-type="string">
            <text:p>Attack, Decay</text:p>
          </table:table-cell>
          <table:table-cell table:style-name="ce23"/>
          <table:table-cell table:style-name="ce5" office:value-type="string" ns42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ns42:value-type="string">
            <text:p>Lowpass/Bandpass/Highpass</text:p>
          </table:table-cell>
          <table:table-cell table:style-name="ce79" office:value-type="string" ns42:value-type="string">
            <text:p>4 ?</text:p>
          </table:table-cell>
          <table:table-cell table:style-name="ce10" office:value-type="string" ns42:value-type="string">
            <text:p>Frequency</text:p>
          </table:table-cell>
          <table:table-cell table:style-name="ce10" office:value-type="string" ns42:value-type="string">
            <text:p>Resonance</text:p>
          </table:table-cell>
          <table:table-cell table:style-name="ce38" office:value-type="string" ns42:value-type="string">
            <text:p>TODO</text:p>
          </table:table-cell>
          <table:table-cell table:style-name="ce10" office:value-type="string" ns42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MPC2000(XL)/MPC3000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PGM/SND/WAV</text:p>
          </table:table-cell>
          <table:table-cell table:style-name="ce72" table:number-columns-repeated="2"/>
          <table:table-cell table:style-name="ce17" office:value-type="float" office:value="16" ns42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79" office:value-type="string" ns42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Pad</text:p>
          </table:table-cell>
          <table:table-cell table:style-name="ce23"/>
          <table:table-cell table:style-name="ce10" office:value-type="string" ns42:value-type="string">
            <text:p>1 MIDI Note</text:p>
          </table:table-cell>
          <table:table-cell table:style-name="ce23"/>
          <table:table-cell table:style-name="ce20" office:value-type="string" ns42:value-type="string">
            <text:p>3 layers with 2 split points</text:p>
          </table:table-cell>
          <table:table-cell table:style-name="ce23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Tuning</text:p>
          </table:table-cell>
          <table:table-cell table:style-name="ce23" table:number-columns-repeated="2"/>
          <table:table-cell table:style-name="ce10" office:value-type="string" ns42:value-type="string">
            <text:p>Stereo Level + Solo Level</text:p>
          </table:table-cell>
          <table:table-cell table:style-name="ce10" office:value-type="string" ns42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ns42:value-type="string">
            <text:p><text:span text:style-name="T2">loop end - </text:span>loop length</text:p>
          </table:table-cell>
          <table:table-cell table:style-name="ce5" office:value-type="string" ns42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ns42:value-type="string">
            <text:p>Attack, Decay</text:p>
          </table:table-cell>
          <table:table-cell table:style-name="ce23"/>
          <table:table-cell table:style-name="ce5" office:value-type="string" ns42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ns42:value-type="string">
            <text:p>Lowpass</text:p>
          </table:table-cell>
          <table:table-cell table:style-name="ce79" office:value-type="string" ns42:value-type="string">
            <text:p>4 ?</text:p>
          </table:table-cell>
          <table:table-cell table:style-name="ce10" office:value-type="string" ns42:value-type="string">
            <text:p>Frequency</text:p>
          </table:table-cell>
          <table:table-cell table:style-name="ce10" office:value-type="string" ns42:value-type="string">
            <text:p>Resonance</text:p>
          </table:table-cell>
          <table:table-cell table:style-name="ce79" office:value-type="string" ns42:value-type="string">
            <text:p>Attack, Decay</text:p>
          </table:table-cell>
          <table:table-cell table:style-name="ce10" office:value-type="string" ns42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S900/S950 Image</text:p>
            <text:p/>
          </table:table-cell>
          <table:table-cell table:style-name="ce68"/>
          <table:table-cell table:style-name="ce10" office:value-type="string" ns42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ns42:value-type="float">
            <text:p>12</text:p>
          </table:table-cell>
          <table:table-cell table:style-name="ce17" office:value-type="string" ns42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2" table:number-columns-repeated="2"/>
          <table:table-cell table:style-name="ce79" office:value-type="string" ns42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ns42:value-type="string">
            <text:p>MIDI root note</text:p>
          </table:table-cell>
          <table:table-cell table:style-name="ce10" office:value-type="string" ns42:value-type="string">
            <text:p>low / high note</text:p>
          </table:table-cell>
          <table:table-cell table:style-name="ce23"/>
          <table:table-cell table:style-name="ce20" office:value-type="string" ns42:value-type="string">
            <text:p>2 velocity layers with 1 split point</text:p>
          </table:table-cell>
          <table:table-cell table:style-name="ce23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semitone-tune / fine tune</text:p>
          </table:table-cell>
          <table:table-cell table:style-name="ce10" office:value-type="string" ns42:value-type="string">
            <text:p>Keytracking</text:p>
          </table:table-cell>
          <table:table-cell table:style-name="ce10" office:value-type="string" ns42:value-type="string">
            <text:p>reverse</text:p>
          </table:table-cell>
          <table:table-cell table:style-name="ce79" office:value-type="string" ns42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ns42:value-type="string">
            <text:p>Forward / alternating</text:p>
          </table:table-cell>
          <table:table-cell table:style-name="ce23"/>
          <table:table-cell table:style-name="ce20" office:value-type="string" ns42:value-type="string">
            <text:p>loop length</text:p>
          </table:table-cell>
          <table:table-cell table:style-name="ce23" office:value-type="string" ns42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attack, decay, sustain, release</text:p>
          </table:table-cell>
          <table:table-cell table:style-name="ce23"/>
          <table:table-cell table:style-name="ce20" office:value-type="string" ns42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ns42:value-type="string">
            <text:p>Lowpass</text:p>
          </table:table-cell>
          <table:table-cell table:style-name="ce79" office:value-type="float" office:value="2" ns42:value-type="float">
            <text:p>2</text:p>
          </table:table-cell>
          <table:table-cell table:style-name="ce10" office:value-type="string" ns42:value-type="string">
            <text:p>frequency</text:p>
          </table:table-cell>
          <table:table-cell table:style-name="ce23" table:number-columns-repeated="2"/>
          <table:table-cell table:style-name="ce20" office:value-type="string" ns42:value-type="string">
            <text:p>TODO unknown where </text:p>
            <text:p>stored</text:p>
          </table:table-cell>
          <table:table-cell table:style-name="ce20" office:value-type="string" ns42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S1000/S3000 Image</text:p>
            <text:p>Akai MESA (S3P)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79" office:value-type="string" ns42:value-type="string">
            <text:p>from filename</text:p>
          </table:table-cell>
          <table:table-cell table:style-name="ce72"/>
          <table:table-cell table:style-name="ce79" office:value-type="string" ns42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ns42:value-type="string">
            <text:p>MIDI root note</text:p>
          </table:table-cell>
          <table:table-cell table:style-name="ce10" office:value-type="string" ns42:value-type="string">
            <text:p>low / high note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semitone-tune / fine tune</text:p>
          </table:table-cell>
          <table:table-cell table:style-name="ce10" office:value-type="string" ns42:value-type="string">
            <text:p>Keytracking</text:p>
          </table:table-cell>
          <table:table-cell table:style-name="ce72"/>
          <table:table-cell table:style-name="ce79" office:value-type="string" ns42:value-type="string">
            <text:p>(relative) gain</text:p>
          </table:table-cell>
          <table:table-cell table:style-name="ce10" office:value-type="string" ns42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ns42:value-type="string">
            <text:p>sustain loop</text:p>
          </table:table-cell>
          <table:table-cell table:style-name="ce17" office:value-type="string" ns42:value-type="string">
            <text:p>only forwards</text:p>
          </table:table-cell>
          <table:table-cell table:style-name="ce23"/>
          <table:table-cell table:style-name="ce10" office:value-type="string" ns42:value-type="string">
            <text:p><text:span text:style-name="T2">end loop marker – </text:span>loop length</text:p>
          </table:table-cell>
          <table:table-cell table:style-name="ce10" office:value-type="string" ns42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ns42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ns42:value-type="string">
            <text:p>AUX: ADSR</text:p>
          </table:table-cell>
          <table:table-cell table:style-name="ce4"/>
          <table:table-cell table:style-name="ce79"/>
          <table:table-cell table:style-name="ce79" office:value-type="string" ns42:value-type="string">
            <text:p>Lowpass</text:p>
          </table:table-cell>
          <table:table-cell table:style-name="ce79" office:value-type="float" office:value="3" ns42:value-type="float">
            <text:p>3</text:p>
          </table:table-cell>
          <table:table-cell table:style-name="ce10" office:value-type="string" ns42:value-type="string">
            <text:p>frequency</text:p>
          </table:table-cell>
          <table:table-cell table:style-name="ce23"/>
          <table:table-cell table:style-name="ce10" office:value-type="string" ns42:value-type="string">
            <text:p>attack, decay, sustain, release</text:p>
          </table:table-cell>
          <table:table-cell table:style-name="ce10" office:value-type="string" ns42:value-type="string">
            <text:p>velocityToFilter</text:p>
          </table:table-cell>
          <table:table-cell table:style-name="ce10" office:value-type="string" ns42:value-type="string">
            <text:p>keyToFilter</text:p>
          </table:table-cell>
        </table:table-row>
        <table:table-row table:style-name="ro2">
          <table:table-cell table:style-name="ce3" office:value-type="string" ns42:value-type="string" table:number-columns-spanned="1" table:number-rows-spanned="2">
            <text:p>DecentSampler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dspreset</text:p>
          </table:table-cell>
          <table:table-cell table:style-name="ce11" office:value-type="string" ns42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File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tuning</text:p>
          </table:table-cell>
          <table:table-cell table:style-name="ce11" office:value-type="string" ns42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seqMode</text:p>
          </table:table-cell>
          <table:table-cell table:style-name="ce11" office:value-type="string" ns42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loopStart</text:p>
          </table:table-cell>
          <table:table-cell table:style-name="ce11" office:value-type="string" ns42:value-type="string" table:number-columns-spanned="1" table:number-rows-spanned="2">
            <text:p>loopEnd</text:p>
          </table:table-cell>
          <table:table-cell table:style-name="ce11" office:value-type="string" ns42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ns42:value-type="string" table:number-columns-spanned="1" table:number-rows-spanned="2">
            <text:p>attackCurve, decayCurve, releaseCurve</text:p>
          </table:table-cell>
          <table:table-cell table:style-name="ce79" office:value-type="string" ns42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ns42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ns42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Low Pass</text:p>
          </table:table-cell>
          <table:table-cell table:style-name="ce17" office:value-type="float" office:value="4" ns42:value-type="float" table:number-columns-spanned="1" table:number-rows-spanned="2">
            <text:p>4</text:p>
          </table:table-cell>
          <table:table-cell table:style-name="ce5" office:value-type="string" ns42:value-type="string" table:number-columns-spanned="1" table:number-rows-spanned="2">
            <text:p>frequency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24" office:value-type="string" ns42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ns42:value-type="string">
            <text:p>Downloadable Sound (DLS)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9" office:value-type="string" ns42:value-type="string">
            <text:p>Drum / from filename</text:p>
          </table:table-cell>
          <table:table-cell table:style-name="ce72"/>
          <table:table-cell table:number-columns-repeated="2" table:style-name="ce5" office:value-type="string" ns42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Region</text:p>
          </table:table-cell>
          <table:table-cell table:style-name="ce10" office:value-type="string" ns42:value-type="string">
            <text:p>unityNote</text:p>
          </table:table-cell>
          <table:table-cell table:style-name="ce10" office:value-type="string" ns42:value-type="string">
            <text:p>range low/high</text:p>
          </table:table-cell>
          <table:table-cell table:style-name="ce72"/>
          <table:table-cell table:style-name="ce10" office:value-type="string" ns42:value-type="string">
            <text:p>velocity low/high</text:p>
          </table:table-cell>
          <table:table-cell table:style-name="ce72" table:number-columns-repeated="3"/>
          <table:table-cell table:style-name="ce10" office:value-type="string" ns42:value-type="string">
            <text:p>Tuning</text:p>
          </table:table-cell>
          <table:table-cell table:style-name="ce72" table:number-columns-repeated="2"/>
          <table:table-cell table:style-name="ce10" office:value-type="string" ns42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ns42:value-type="string">
            <text:p>SMPL-Chunk</text:p>
          </table:table-cell>
          <table:table-cell table:style-name="ce5" office:value-type="string" ns42:value-type="string">
            <text:p>type</text:p>
          </table:table-cell>
          <table:table-cell table:style-name="ce23"/>
          <table:table-cell table:style-name="ce5" office:value-type="string" ns42:value-type="string">
            <text:p>start</text:p>
          </table:table-cell>
          <table:table-cell table:style-name="ce5" office:value-type="string" ns42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ns42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ns42:value-type="string">
            <text:p>CONN_SRC_PITCHWHEEL → CONN_DST_PITCH</text:p>
          </table:table-cell>
          <table:table-cell table:style-name="ce20"/>
          <table:table-cell table:style-name="ce5" office:value-type="string" ns42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ns42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discoDSP Bliss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zbp</text:p>
          </table:table-cell>
          <table:table-cell table:style-name="ce11" office:value-type="string" ns42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Filename</text:p>
          </table:table-cell>
          <table:table-cell table:number-columns-repeated="2" table:style-name="ce79" office:value-type="string" ns42:value-type="string">
            <text:p>from filename</text:p>
          </table:table-cell>
          <table:table-cell table:style-name="ce79" office:value-type="string" ns42:value-type="string">
            <text:p>from file</text:p>
          </table:table-cell>
          <table:table-cell table:style-name="ce72"/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midi_coarse_tune / midi_fine_tune</text:p>
          </table:table-cell>
          <table:table-cell table:style-name="ce11" office:value-type="string" ns42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mp_gain</text:p>
          </table:table-cell>
          <table:table-cell table:style-name="ce11" office:value-type="string" ns42:value-type="string" table:number-columns-spanned="1" table:number-rows-spanned="2">
            <text:p>mp_pan</text:p>
          </table:table-cell>
          <table:table-cell table:style-name="ce11" office:value-type="string" ns42:value-type="string" table:number-columns-spanned="1" table:number-rows-spanned="2">
            <text:p>seq_length</text:p>
            <text:p>seq_position</text:p>
          </table:table-cell>
          <table:table-cell table:style-name="ce11" office:value-type="string" ns42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loop_mode</text:p>
          </table:table-cell>
          <table:table-cell table:style-name="ce11" office:value-type="string" ns42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op_start</text:p>
          </table:table-cell>
          <table:table-cell table:style-name="ce11" office:value-type="string" ns42:value-type="string" table:number-columns-spanned="1" table:number-rows-spanned="2">
            <text:p>loop_end</text:p>
          </table:table-cell>
          <table:table-cell table:style-name="ce11" office:value-type="string" ns42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ns42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ns42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ns42:value-type="string" table:number-columns-spanned="1" table:number-rows-spanned="2">
            <text:p>sys_pit_rng</text:p>
          </table:table-cell>
          <table:table-cell table:style-name="ce79" office:value-type="string" ns42:value-type="string" table:number-columns-spanned="1" table:number-rows-spanned="2">
            <text:p>sys_pit_rng</text:p>
          </table:table-cell>
          <table:table-cell table:style-name="ce11" office:value-type="string" ns42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Low Pass</text:p>
          </table:table-cell>
          <table:table-cell table:style-name="ce17" office:value-type="float" office:value="4" ns42:value-type="float" table:number-columns-spanned="1" table:number-rows-spanned="2">
            <text:p>4</text:p>
          </table:table-cell>
          <table:table-cell table:style-name="ce5" office:value-type="string" ns42:value-type="string" table:number-columns-spanned="1" table:number-rows-spanned="2">
            <text:p>flt1_cut_frq</text:p>
          </table:table-cell>
          <table:table-cell table:style-name="ce5" office:value-type="string" ns42:value-type="string" table:number-columns-spanned="1" table:number-rows-spanned="2">
            <text:p>flt1_res_amt</text:p>
          </table:table-cell>
          <table:table-cell table:style-name="ce11" office:value-type="string" ns42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ns42:value-type="string" table:number-columns-spanned="1" table:number-rows-spanned="2">
            <text:p>flt1_vel_trk</text:p>
          </table:table-cell>
          <table:table-cell table:style-name="ce11" office:value-type="string" ns42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</table:table-row>
        <table:table-row table:style-name="ro1">
          <table:table-cell table:style-name="ce3" office:value-type="string" ns42:value-type="string" table:number-columns-spanned="1" table:number-rows-spanned="2">
            <text:p>Elektron Tonverk Multisample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Filename</text:p>
          </table:table-cell>
          <table:table-cell table:number-columns-repeated="2" table:style-name="ce79" office:value-type="string" ns42:value-type="string">
            <text:p>from filename</text:p>
          </table:table-cell>
          <table:table-cell table:style-name="ce79" office:value-type="string" ns42:value-type="string">
            <text:p>from file</text:p>
          </table:table-cell>
          <table:table-cell table:style-name="ce72"/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ns42:value-type="string" table:number-columns-spanned="1" table:number-rows-spanned="2">
            <text:p>pitch</text:p>
          </table:table-cell>
          <table:table-cell table:style-name="ce20" office:value-type="string" ns42:value-type="string">
            <text:p>Increasing order</text:p>
          </table:table-cell>
          <table:table-cell table:style-name="ce72"/>
          <table:table-cell table:style-name="ce20" office:value-type="string" ns42:value-type="string">
            <text:p>Increasing order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trimStart</text:p>
          </table:table-cell>
          <table:table-cell table:style-name="ce11" office:value-type="string" ns42:value-type="string" table:number-columns-spanned="1" table:number-rows-spanned="2">
            <text:p>trimEnd</text:p>
          </table:table-cell>
          <table:table-cell table:style-name="ce11" office:value-type="string" ns42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ns42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ns42:value-type="string">
            <text:p>only forwards</text:p>
          </table:table-cell>
          <table:table-cell table:style-name="ce10" office:value-type="string" ns42:value-type="string">
            <text:p>keepLoopingOnRelease</text:p>
          </table:table-cell>
          <table:table-cell table:style-name="ce10" office:value-type="string" ns42:value-type="string">
            <text:p>loopStart</text:p>
          </table:table-cell>
          <table:table-cell table:style-name="ce10" office:value-type="string" ns42:value-type="string">
            <text:p>loopEnd</text:p>
          </table:table-cell>
          <table:table-cell table:style-name="ce11" office:value-type="string" ns42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ns42:value-type="string" table:number-columns-spanned="1" table:number-rows-spanned="2">
            <text:p>Elektron Tonverk Preset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0" office:value-type="string" ns42:value-type="string">
            <text:p>Filename</text:p>
          </table:table-cell>
          <table:table-cell table:style-name="ce10" office:value-type="string" ns42:value-type="string">
            <text:p>category</text:p>
          </table:table-cell>
          <table:table-cell table:style-name="ce79" office:value-type="string" ns42:value-type="string">
            <text:p>from filename</text:p>
          </table:table-cell>
          <table:table-cell table:style-name="ce79" office:value-type="string" ns42:value-type="string">
            <text:p>from file</text:p>
          </table:table-cell>
          <table:table-cell table:style-name="ce72"/>
          <table:table-cell table:style-name="ce10" office:value-type="string" ns42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pitch</text:p>
          </table:table-cell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10" office:value-type="string" ns42:value-type="string">
            <text:p>trimStart /</text:p>
            <text:p>sample_start</text:p>
          </table:table-cell>
          <table:table-cell table:style-name="ce10" office:value-type="string" ns42:value-type="string">
            <text:p>trimEnd /</text:p>
            <text:p>sample_end</text:p>
          </table:table-cell>
          <table:table-cell table:style-name="ce10" office:value-type="string" ns42:value-type="string">
            <text:p>pitch – keyCenter</text:p>
          </table:table-cell>
          <table:table-cell table:style-name="ce23" table:number-columns-repeated="2"/>
          <table:table-cell table:style-name="ce10" office:value-type="string" ns42:value-type="string">
            <text:p>volume</text:p>
          </table:table-cell>
          <table:table-cell table:style-name="ce10" office:value-type="string" ns42:value-type="string">
            <text:p>pan</text:p>
          </table:table-cell>
          <table:table-cell table:style-name="ce10" office:value-type="string" ns42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ns42:value-type="string">
            <text:p>only forwards</text:p>
          </table:table-cell>
          <table:table-cell table:style-name="ce10" office:value-type="string" ns42:value-type="string">
            <text:p>keepLoopingOnRelease</text:p>
          </table:table-cell>
          <table:table-cell table:style-name="ce10" office:value-type="string" ns42:value-type="string">
            <text:p>loopStart /</text:p>
            <text:p>loop_start</text:p>
          </table:table-cell>
          <table:table-cell table:style-name="ce10" office:value-type="string" ns42:value-type="string">
            <text:p>loopEnd /</text:p>
            <text:p>loop_end</text:p>
          </table:table-cell>
          <table:table-cell table:style-name="ce10" office:value-type="string" ns42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ns42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ns42:value-type="string">
            <text:p>Lowpass / Bandpass /</text:p>
            <text:p>Highpass (morph)</text:p>
          </table:table-cell>
          <table:table-cell table:style-name="ce17" office:value-type="float" office:value="2" ns42:value-type="float">
            <text:p>2</text:p>
          </table:table-cell>
          <table:table-cell table:style-name="ce5" office:value-type="string" ns42:value-type="string">
            <text:p>filter_frequency</text:p>
          </table:table-cell>
          <table:table-cell table:style-name="ce5" office:value-type="string" ns42:value-type="string">
            <text:p>filter_resonance</text:p>
          </table:table-cell>
          <table:table-cell table:style-name="ce10" office:value-type="string" ns42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ns42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ns42:value-type="string">
            <text:p>16, 24</text:p>
          </table:table-cell>
          <table:table-cell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0" office:value-type="string" ns42:value-type="string">
            <text:p>Name</text:p>
          </table:table-cell>
          <table:table-cell table:style-name="ce10" office:value-type="string" ns42:value-type="string">
            <text:p>category</text:p>
          </table:table-cell>
          <table:table-cell table:style-name="ce72" table:number-columns-repeated="3"/>
          <table:table-cell table:style-name="ce10" office:value-type="string" ns42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pitch</text:p>
          </table:table-cell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10" office:value-type="string" ns42:value-type="string">
            <text:p>physically</text:p>
            <text:p>trimmed</text:p>
          </table:table-cell>
          <table:table-cell table:style-name="ce10" office:value-type="string" ns42:value-type="string">
            <text:p>physically</text:p>
            <text:p>trimmed</text:p>
          </table:table-cell>
          <table:table-cell table:style-name="ce10" office:value-type="string" ns42:value-type="string">
            <text:p>pitch – keyCenter</text:p>
          </table:table-cell>
          <table:table-cell table:style-name="ce23" table:number-columns-repeated="2"/>
          <table:table-cell table:style-name="ce10" office:value-type="string" ns42:value-type="string">
            <text:p>volume</text:p>
          </table:table-cell>
          <table:table-cell table:style-name="ce10" office:value-type="string" ns42:value-type="string">
            <text:p>pan</text:p>
          </table:table-cell>
          <table:table-cell table:style-name="ce10" office:value-type="string" ns42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ns42:value-type="string">
            <text:p>Forward / Off</text:p>
          </table:table-cell>
          <table:table-cell table:style-name="ce10"/>
          <table:table-cell table:style-name="ce10" office:value-type="string" ns42:value-type="string">
            <text:p>loopStart</text:p>
          </table:table-cell>
          <table:table-cell table:style-name="ce10" office:value-type="string" ns42:value-type="string">
            <text:p>loopEnd</text:p>
          </table:table-cell>
          <table:table-cell table:style-name="ce10" office:value-type="string" ns42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ns42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ns42:value-type="string">
            <text:p>Lowpass / Bandpass /</text:p>
            <text:p>Highpass (morph)</text:p>
          </table:table-cell>
          <table:table-cell table:style-name="ce17" office:value-type="float" office:value="2" ns42:value-type="float">
            <text:p>2</text:p>
          </table:table-cell>
          <table:table-cell table:style-name="ce5" office:value-type="string" ns42:value-type="string">
            <text:p>filter_frequency</text:p>
          </table:table-cell>
          <table:table-cell table:style-name="ce5" office:value-type="string" ns42:value-type="string">
            <text:p>filter_resonance</text:p>
          </table:table-cell>
          <table:table-cell table:style-name="ce10" office:value-type="string" ns42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ns42:value-type="string">
            <text:p>Ensoniq EPS/EPS16+/ASR-10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ns42:value-type="float">
            <text:p>16</text:p>
          </table:table-cell>
          <table:table-cell table:style-name="ce79" office:value-type="string" ns42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wave-sample</text:p>
          </table:table-cell>
          <table:table-cell table:style-name="ce10" office:value-type="string" ns42:value-type="string">
            <text:p>rootKey</text:p>
          </table:table-cell>
          <table:table-cell table:style-name="ce10" office:value-type="string" ns42:value-type="string">
            <text:p>keyLow / keyHigh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ns42:value-type="string">
            <text:p>volume</text:p>
          </table:table-cell>
          <table:table-cell table:style-name="ce10" office:value-type="string" ns42:value-type="string">
            <text:p>pan-position</text:p>
          </table:table-cell>
          <table:table-cell table:style-name="ce72"/>
          <table:table-cell table:style-name="ce10" office:value-type="string" ns42:value-type="string">
            <text:p>key-press-layers</text:p>
            <text:p>key-release-layers</text:p>
          </table:table-cell>
          <table:table-cell table:style-name="ce82"/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forward / backward / alternating</text:p>
          </table:table-cell>
          <table:table-cell table:style-name="ce10" office:value-type="string" ns42:value-type="string">
            <text:p>loop mode == 4</text:p>
          </table:table-cell>
          <table:table-cell table:style-name="ce5" office:value-type="string" ns42:value-type="string">
            <text:p>loop start</text:p>
          </table:table-cell>
          <table:table-cell table:style-name="ce5" office:value-type="string" ns42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5-stage envelope</text:p>
          </table:table-cell>
          <table:table-cell table:style-name="ce23"/>
          <table:table-cell table:style-name="ce20" office:value-type="string" ns42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ns42:value-type="string">
            <text:p>pitch bend range</text:p>
          </table:table-cell>
          <table:table-cell table:style-name="ce5" office:value-type="string" ns42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ns42:value-type="string">
            <text:p>Filter 1 Lowpass (Hi-Pass on Filter 2)</text:p>
          </table:table-cell>
          <table:table-cell table:style-name="ce5" office:value-type="string" ns42:value-type="string">
            <text:p>2, 3, 4</text:p>
          </table:table-cell>
          <table:table-cell table:style-name="ce5" office:value-type="string" ns42:value-type="string">
            <text:p>filter 1 cutoff</text:p>
          </table:table-cell>
          <table:table-cell table:style-name="ce23"/>
          <table:table-cell table:style-name="ce5" office:value-type="string" ns42:value-type="string">
            <text:p>5-stage envelope</text:p>
          </table:table-cell>
          <table:table-cell table:style-name="ce5" office:value-type="string" ns42:value-type="string">
            <text:p>filter 1 modulation = pressure</text:p>
          </table:table-cell>
          <table:table-cell table:style-name="ce5" office:value-type="string" ns42:value-type="string">
            <text:p>filter1EnvelopeAmount</text:p>
          </table:table-cell>
        </table:table-row>
        <table:table-row table:style-name="ro2">
          <table:table-cell table:style-name="ce3" office:value-type="string" ns42:value-type="string">
            <text:p>Ensoniq Mirage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ebm, img, hfe</text:p>
          </table:table-cell>
          <table:table-cell table:style-name="ce72" table:number-columns-repeated="2"/>
          <table:table-cell table:style-name="ce17" office:value-type="float" office:value="8" ns42:value-type="float">
            <text:p>8</text:p>
          </table:table-cell>
          <table:table-cell table:style-name="ce20" office:value-type="string" ns42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ns42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wave-sample</text:p>
          </table:table-cell>
          <table:table-cell table:style-name="ce20" office:value-type="string" ns42:value-type="string">
            <text:p>from sample rate</text:p>
          </table:table-cell>
          <table:table-cell table:style-name="ce10" office:value-type="string" ns42:value-type="string">
            <text:p>top key</text:p>
          </table:table-cell>
          <table:table-cell table:style-name="ce72"/>
          <table:table-cell table:style-name="ce79" office:value-type="string" ns42:value-type="string">
            <text:p>2 layers</text:p>
          </table:table-cell>
          <table:table-cell table:style-name="ce79" office:value-type="string" ns42:value-type="string">
            <text:p>by key-velocity</text:p>
          </table:table-cell>
          <table:table-cell table:style-name="ce72" table:number-columns-repeated="2"/>
          <table:table-cell table:style-name="ce10" office:value-type="string" ns42:value-type="string">
            <text:p>tuning</text:p>
          </table:table-cell>
          <table:table-cell table:style-name="ce72" table:number-columns-repeated="2"/>
          <table:table-cell table:style-name="ce10" office:value-type="string" ns42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ns42:value-type="string">
            <text:p>loop mode</text:p>
          </table:table-cell>
          <table:table-cell table:style-name="ce17" office:value-type="string" ns42:value-type="string">
            <text:p>only forwards</text:p>
          </table:table-cell>
          <table:table-cell table:style-name="ce23"/>
          <table:table-cell table:style-name="ce5" office:value-type="string" ns42:value-type="string">
            <text:p>loop start</text:p>
          </table:table-cell>
          <table:table-cell table:style-name="ce5" office:value-type="string" ns42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ns42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ns42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ns42:value-type="string">
            <text:p>Lowpass</text:p>
          </table:table-cell>
          <table:table-cell table:style-name="ce79" office:value-type="float" office:value="4" ns42:value-type="float">
            <text:p>4</text:p>
          </table:table-cell>
          <table:table-cell table:style-name="ce79" office:value-type="string" ns42:value-type="string">
            <text:p>cutoffFreq + relativeFilterFreq</text:p>
          </table:table-cell>
          <table:table-cell table:style-name="ce10" office:value-type="string" ns42:value-type="string">
            <text:p>resonance</text:p>
          </table:table-cell>
          <table:table-cell table:style-name="ce10" office:value-type="string" ns42:value-type="string">
            <text:p>attack, peak, decay, sustain, </text:p>
            <text:p>release</text:p>
          </table:table-cell>
          <table:table-cell table:style-name="ce10" office:value-type="string" ns42:value-type="string">
            <text:p>filter envelope sustain velocity</text:p>
          </table:table-cell>
          <table:table-cell table:style-name="ce10" office:value-type="string" ns42:value-type="string">
            <text:p>filterKybdTracking</text:p>
          </table:table-cell>
        </table:table-row>
        <table:table-row table:style-name="ro2">
          <table:table-cell table:style-name="ce3" office:value-type="string" ns42:value-type="string" table:number-columns-spanned="1" table:number-rows-spanned="2">
            <text:p>Expert Sleepers disting EX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ns42:value-type="float">
            <text:p>16</text:p>
          </table:table-cell>
          <table:table-cell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7" office:value-type="string" ns42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ns42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ns42:value-type="string" table:number-columns-spanned="1" table:number-rows-spanned="2">
            <text:p>SMPL-Chunk</text:p>
          </table:table-cell>
          <table:table-cell table:style-name="ce5" office:value-type="string" ns42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ns42:value-type="string">
            <text:p>EXS24</text:p>
          </table:table-cell>
          <table:table-cell table:style-name="ce68" office:value-type="string" ns42:value-type="string">
            <text:p>Read</text:p>
            <text:p>Write</text:p>
          </table:table-cell>
          <table:table-cell table:style-name="ce10" office:value-type="string" ns42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AIFF)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10" office:value-type="string" ns42:value-type="string">
            <text:p>from filename/conf BEXT chunk: originator</text:p>
          </table:table-cell>
          <table:table-cell table:style-name="ce10" office:value-type="string" ns42:value-type="string">
            <text:p>BEXT chunk: originationDate/Time</text:p>
          </table:table-cell>
          <table:table-cell table:style-name="ce10" office:value-type="string" ns42:value-type="string">
            <text:p>BEXT chunk: description</text:p>
          </table:table-cell>
          <table:table-cell table:style-name="ce10" office:value-type="string" ns42:value-type="string">
            <text:p>from filename/conf BEXT chunk: originator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10" office:value-type="string" ns42:value-type="string">
            <text:p>group</text:p>
          </table:table-cell>
          <table:table-cell table:style-name="ce10" office:value-type="string" ns42:value-type="string">
            <text:p>name</text:p>
          </table:table-cell>
          <table:table-cell table:style-name="ce81"/>
          <table:table-cell table:style-name="ce10"/>
          <table:table-cell table:style-name="ce10" office:value-type="string" ns42:value-type="string">
            <text:p>key</text:p>
          </table:table-cell>
          <table:table-cell table:style-name="ce10" office:value-type="string" ns42:value-type="string">
            <text:p>keyLow / keyHigh</text:p>
          </table:table-cell>
          <table:table-cell table:style-name="ce72"/>
          <table:table-cell table:style-name="ce10" office:value-type="string" ns42:value-type="string">
            <text:p>velocityLow / velocityHigh</text:p>
          </table:table-cell>
          <table:table-cell table:style-name="ce72"/>
          <table:table-cell table:style-name="ce10" office:value-type="string" ns42:value-type="string">
            <text:p>sampleStart</text:p>
          </table:table-cell>
          <table:table-cell table:style-name="ce10" office:value-type="string" ns42:value-type="string">
            <text:p>sampleEnd</text:p>
          </table:table-cell>
          <table:table-cell table:style-name="ce10" office:value-type="string" ns42:value-type="string">
            <text:p>coarseTuning / fineTuning</text:p>
          </table:table-cell>
          <table:table-cell table:style-name="ce10" office:value-type="string" ns42:value-type="string">
            <text:p>pitch / oneshot</text:p>
          </table:table-cell>
          <table:table-cell table:style-name="ce10" office:value-type="string" ns42:value-type="string">
            <text:p>reverse</text:p>
          </table:table-cell>
          <table:table-cell table:style-name="ce10" office:value-type="string" ns42:value-type="string">
            <text:p>volumeAdjust</text:p>
          </table:table-cell>
          <table:table-cell table:style-name="ce10" office:value-type="string" ns42:value-type="string">
            <text:p>pan</text:p>
          </table:table-cell>
          <table:table-cell table:style-name="ce10" office:value-type="string" ns42:value-type="string">
            <text:p>roundRobinGroupPos / enableByRoundRobin</text:p>
          </table:table-cell>
          <table:table-cell table:style-name="ce10" office:value-type="string" ns42:value-type="string">
            <text:p>releaseTrigger</text:p>
          </table:table-cell>
          <table:table-cell table:style-name="ce82"/>
          <table:table-cell table:style-name="ce10" office:value-type="string" ns42:value-type="string">
            <text:p>loopOn</text:p>
          </table:table-cell>
          <table:table-cell table:style-name="ce10" office:value-type="string" ns42:value-type="string">
            <text:p>loopDirection</text:p>
          </table:table-cell>
          <table:table-cell table:style-name="ce10" office:value-type="string" ns42:value-type="string">
            <text:p>loopPlayToEndOnRelease</text:p>
          </table:table-cell>
          <table:table-cell table:style-name="ce10" office:value-type="string" ns42:value-type="string">
            <text:p>loopStart</text:p>
          </table:table-cell>
          <table:table-cell table:style-name="ce10" office:value-type="string" ns42:value-type="string">
            <text:p>loopEnd</text:p>
          </table:table-cell>
          <table:table-cell table:style-name="ce10" office:value-type="string" ns42:value-type="string">
            <text:p>loopCrossfade</text:p>
          </table:table-cell>
          <table:table-cell table:style-name="ce10" office:value-type="string" ns42:value-type="string">
            <text:p>loopTune</text:p>
          </table:table-cell>
          <table:table-cell table:style-name="ce81"/>
          <table:table-cell table:style-name="ce10"/>
          <table:table-cell table:style-name="ce10" office:value-type="string" ns42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ns42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ns42:value-type="string">
            <text:p>PARAM_PITCH_BEND_UP</text:p>
          </table:table-cell>
          <table:table-cell table:style-name="ce10" office:value-type="string" ns42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ns42:value-type="string">
            <text:p>PARAM_FILTER1_TOGGLE</text:p>
          </table:table-cell>
          <table:table-cell table:style-name="ce10" office:value-type="string" ns42:value-type="string">
            <text:p>PARAM_FILTER1_TYPE</text:p>
          </table:table-cell>
          <table:table-cell table:number-columns-repeated="2" table:style-name="ce10" office:value-type="string" ns42:value-type="string">
            <text:p>PARAM_FILTER1_CUTOFF</text:p>
          </table:table-cell>
          <table:table-cell table:style-name="ce10" office:value-type="string" ns42:value-type="string">
            <text:p>PARAM_FILTER1_RESO</text:p>
          </table:table-cell>
          <table:table-cell table:style-name="ce10" office:value-type="string" ns42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6" office:value-type="string" ns42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Korgmultisample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11" office:value-type="string" ns42:value-type="string" table:number-columns-spanned="1" table:number-rows-spanned="2">
            <text:p>Category</text:p>
          </table:table-cell>
          <table:table-cell table:style-name="ce11" office:value-type="string" ns42:value-type="string" table:number-columns-spanned="1" table:number-rows-spanned="2">
            <text:p>Author</text:p>
          </table:table-cell>
          <table:table-cell table:style-name="ce11" office:value-type="string" ns42:value-type="string" table:number-columns-spanned="1" table:number-rows-spanned="2">
            <text:p>Time of storage</text:p>
          </table:table-cell>
          <table:table-cell table:style-name="ce11" office:value-type="string" ns42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Original Key</text:p>
          </table:table-cell>
          <table:table-cell table:style-name="ce5" office:value-type="string" ns42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17" office:value-type="string" ns42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ns42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ns42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ns42:value-type="string" table:number-columns-spanned="1" table:number-rows-spanned="2">
            <text:p>Korg KMP/KSF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ns42:value-type="string">
            <text:p>8, 16</text:p>
          </table:table-cell>
          <table:table-cell table:style-name="ce17" office:value-type="string" ns42:value-type="string">
            <text:p>Up to 48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Original Key</text:p>
          </table:table-cell>
          <table:table-cell table:style-name="ce5" office:value-type="string" ns42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17" office:value-type="string" ns42:value-type="string" table:number-columns-spanned="1" table:number-rows-spanned="2">
            <text:p>On/off</text:p>
          </table:table-cell>
          <table:table-cell table:style-name="ce5" office:value-type="string" ns42:value-type="string" table:number-columns-spanned="1" table:number-rows-spanned="2">
            <text:p>reverse</text:p>
          </table:table-cell>
          <table:table-cell table:style-name="ce5" office:value-type="string" ns42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ns42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ns42:value-type="string">
            <text:p>NKM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 office:value-type="string" ns42:value-type="string">
            <text:p>Only Kontakt 2-4</text:p>
          </table:table-cell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icon / soundinfo</text:p>
          </table:table-cell>
          <table:table-cell table:style-name="ce5" office:value-type="string" ns42:value-type="string">
            <text:p>author / soundinfo</text:p>
          </table:table-cell>
          <table:table-cell table:style-name="ce5" office:value-type="string" ns42:value-type="string">
            <text:p>header: creation (also K1)</text:p>
          </table:table-cell>
          <table:table-cell table:style-name="ce5" office:value-type="string" ns42:value-type="string">
            <text:p>instrumentCredits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rootKey</text:p>
          </table:table-cell>
          <table:table-cell table:style-name="ce5" office:value-type="string" ns42:value-type="string" table:number-columns-spanned="1" table:number-rows-spanned="2">
            <text:p>lowKey / highKey</text:p>
          </table:table-cell>
          <table:table-cell table:style-name="ce5" office:value-type="string" ns42:value-type="string" table:number-columns-spanned="1" table:number-rows-spanned="2">
            <text:p>fadeLow / fadeHigh</text:p>
          </table:table-cell>
          <table:table-cell table:style-name="ce5" office:value-type="string" ns42:value-type="string" table:number-columns-spanned="1" table:number-rows-spanned="2">
            <text:p>lowVelocity / highVelocity</text:p>
          </table:table-cell>
          <table:table-cell table:style-name="ce5" office:value-type="string" ns42:value-type="string" table:number-columns-spanned="1" table:number-rows-spanned="2">
            <text:p>fadeLowVel / fadeHighVel</text:p>
          </table:table-cell>
          <table:table-cell table:style-name="ce5" office:value-type="string" ns42:value-type="string" table:number-columns-spanned="1" table:number-rows-spanned="2">
            <text:p>sampleStart</text:p>
          </table:table-cell>
          <table:table-cell table:style-name="ce5" office:value-type="string" ns42:value-type="string" table:number-columns-spanned="1" table:number-rows-spanned="2">
            <text:p>sampleEnd</text:p>
          </table:table-cell>
          <table:table-cell table:style-name="ce5" office:value-type="string" ns42:value-type="string" table:number-columns-spanned="1" table:number-rows-spanned="2">
            <text:p>zoneTune / groupTune / progTune</text:p>
          </table:table-cell>
          <table:table-cell table:style-name="ce5" office:value-type="string" ns42:value-type="string" table:number-columns-spanned="1" table:number-rows-spanned="2">
            <text:p>keyTracking</text:p>
          </table:table-cell>
          <table:table-cell table:style-name="ce5" office:value-type="string" ns42:value-type="string" table:number-columns-spanned="1" table:number-rows-spanned="2">
            <text:p>reverse</text:p>
          </table:table-cell>
          <table:table-cell table:style-name="ce5" office:value-type="string" ns42:value-type="string" table:number-columns-spanned="1" table:number-rows-spanned="2">
            <text:p>zoneVol / groupVol / progVol</text:p>
          </table:table-cell>
          <table:table-cell table:style-name="ce5" office:value-type="string" ns42:value-type="string" table:number-columns-spanned="1" table:number-rows-spanned="2">
            <text:p>zonePan / groupPan / progPan</text:p>
          </table:table-cell>
          <table:table-cell table:style-name="ce24" office:value-type="string" ns42:value-type="string" table:number-columns-spanned="1" table:number-rows-spanned="2">
            <text:p>GroupStart</text:p>
          </table:table-cell>
          <table:table-cell table:style-name="ce5" office:value-type="string" ns42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Loop Mode</text:p>
          </table:table-cell>
          <table:table-cell table:style-name="ce5" office:value-type="string" ns42:value-type="string" table:number-columns-spanned="1" table:number-rows-spanned="2">
            <text:p>Loop Mode</text:p>
          </table:table-cell>
          <table:table-cell table:style-name="ce5" office:value-type="string" ns42:value-type="string" table:number-columns-spanned="1" table:number-rows-spanned="2">
            <text:p>Loop Mode</text:p>
          </table:table-cell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Length</text:p>
          </table:table-cell>
          <table:table-cell table:style-name="ce5" office:value-type="string" ns42:value-type="string" table:number-columns-spanned="1" table:number-rows-spanned="2">
            <text:p>XfadeLength</text:p>
          </table:table-cell>
          <table:table-cell table:style-name="ce5" office:value-type="string" ns42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IntMod : target = volume</text:p>
          </table:table-cell>
          <table:table-cell table:style-name="ce5" office:value-type="string" ns42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ns42:value-type="string" table:number-columns-spanned="1" table:number-rows-spanned="2">
            <text:p>atkCurving</text:p>
          </table:table-cell>
          <table:table-cell table:style-name="ce5" office:value-type="string" ns42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1" office:value-type="string" ns42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ns42:value-type="string" table:number-columns-spanned="1" table:number-rows-spanned="2">
            <text:p>only Kontakt 1 Format</text:p>
          </table:table-cell>
          <table:table-cell table:style-name="ce17" office:value-type="string" ns42:value-type="string" table:number-columns-spanned="1" table:number-rows-spanned="2">
            <text:p>type: lp2pole</text:p>
          </table:table-cell>
          <table:table-cell table:style-name="ce17" office:value-type="string" ns42:value-type="string" table:number-columns-spanned="1" table:number-rows-spanned="2">
            <text:p>(type)</text:p>
          </table:table-cell>
          <table:table-cell table:style-name="ce17" office:value-type="string" ns42:value-type="string" table:number-columns-spanned="1" table:number-rows-spanned="2">
            <text:p>cutoff</text:p>
          </table:table-cell>
          <table:table-cell table:style-name="ce17" office:value-type="string" ns42:value-type="string" table:number-columns-spanned="1" table:number-rows-spanned="2">
            <text:p>resonance</text:p>
          </table:table-cell>
          <table:table-cell table:style-name="ce17" office:value-type="string" ns42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ns42:value-type="string" table:number-columns-spanned="1" table:number-rows-spanned="2">
            <text:p>Filter Cutoff Velocity Intensity</text:p>
          </table:table-cell>
          <table:table-cell table:style-name="ce16" office:value-type="string" ns42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 Kontakt 1</text:p>
          </table:table-cell>
          <table:covered-table-cell table:number-columns-repeated="2" table:style-name="ce4"/>
          <table:table-cell table:style-name="ce15" office:value-type="string" ns42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ns42:value-type="string">
            <text:p>Only Kontakt 2-4</text:p>
          </table:table-cell>
          <table:table-cell table:style-name="ce5" office:value-type="string" ns42:value-type="string">
            <text:p>Name</text:p>
          </table:table-cell>
          <table:table-cell table:style-name="ce72"/>
          <table:table-cell table:style-name="ce23"/>
          <table:table-cell table:style-name="ce5" office:value-type="string" ns42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9">
          <table:table-cell table:style-name="ce3" office:value-type="string" ns42:value-type="string">
            <text:p><text:span text:style-name="T1">Native Instruments </text:span>Kontakt 4.2-7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>
            <text:p>NKI</text:p>
          </table:table-cell>
          <table:table-cell table:style-name="ce72"/>
          <table:table-cell table:style-name="ce5" office:value-type="string" ns42:value-type="string">
            <text:p>NKM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icon / soundinfo</text:p>
          </table:table-cell>
          <table:table-cell table:style-name="ce5" office:value-type="string" ns42:value-type="string">
            <text:p>author / soundinfo</text:p>
          </table:table-cell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instrumentCredits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ns42:value-type="string">
            <text:p>group name</text:p>
          </table:table-cell>
          <table:table-cell table:style-name="ce81"/>
          <table:table-cell table:style-name="ce5"/>
          <table:table-cell table:style-name="ce5" office:value-type="string" ns42:value-type="string">
            <text:p>rootKey</text:p>
          </table:table-cell>
          <table:table-cell table:style-name="ce5" office:value-type="string" ns42:value-type="string">
            <text:p>lowKey / highKey</text:p>
          </table:table-cell>
          <table:table-cell table:style-name="ce5" office:value-type="string" ns42:value-type="string">
            <text:p>fadeLow / fadeHigh</text:p>
          </table:table-cell>
          <table:table-cell table:style-name="ce5" office:value-type="string" ns42:value-type="string">
            <text:p>lowVelocity / highVelocity</text:p>
          </table:table-cell>
          <table:table-cell table:style-name="ce5" office:value-type="string" ns42:value-type="string">
            <text:p>fadeLowVel / fadeHighVel</text:p>
          </table:table-cell>
          <table:table-cell table:style-name="ce5" office:value-type="string" ns42:value-type="string">
            <text:p>sampleStart</text:p>
          </table:table-cell>
          <table:table-cell table:style-name="ce5" office:value-type="string" ns42:value-type="string">
            <text:p>sampleEnd</text:p>
          </table:table-cell>
          <table:table-cell table:style-name="ce5" office:value-type="string" ns42:value-type="string">
            <text:p>zoneTune / groupTune / progTune</text:p>
          </table:table-cell>
          <table:table-cell table:style-name="ce17" office:value-type="string" ns42:value-type="string">
            <text:p>keyTracking (from group)</text:p>
          </table:table-cell>
          <table:table-cell table:style-name="ce17" office:value-type="string" ns42:value-type="string">
            <text:p>reverse (from group)</text:p>
          </table:table-cell>
          <table:table-cell table:style-name="ce5" office:value-type="string" ns42:value-type="string">
            <text:p>zoneVol / groupVol / progVol</text:p>
          </table:table-cell>
          <table:table-cell table:style-name="ce5" office:value-type="string" ns42:value-type="string">
            <text:p>zonePan / groupPan / progPan</text:p>
          </table:table-cell>
          <table:table-cell table:style-name="ce17" office:value-type="string" ns42:value-type="string">
            <text:p>trigger (from group)</text:p>
          </table:table-cell>
          <table:table-cell table:style-name="ce17" office:value-type="string" ns42:value-type="string">
            <text:p>releaseTrigger (from group)</text:p>
          </table:table-cell>
          <table:table-cell table:style-name="ce81"/>
          <table:table-cell table:number-columns-repeated="3" table:style-name="ce5" office:value-type="string" ns42:value-type="string">
            <text:p>Loop Mode</text:p>
          </table:table-cell>
          <table:table-cell table:style-name="ce5" office:value-type="string" ns42:value-type="string">
            <text:p>Loop Start</text:p>
          </table:table-cell>
          <table:table-cell table:style-name="ce5" office:value-type="string" ns42:value-type="string">
            <text:p>Loop Length</text:p>
          </table:table-cell>
          <table:table-cell table:style-name="ce5" office:value-type="string" ns42:value-type="string">
            <text:p>XfadeLength</text:p>
          </table:table-cell>
          <table:table-cell table:style-name="ce5" office:value-type="string" ns42:value-type="string">
            <text:p>Loop Tuning</text:p>
          </table:table-cell>
          <table:table-cell table:style-name="ce81"/>
          <table:table-cell table:style-name="ce5" office:value-type="string" ns42:value-type="string">
            <text:p>Internal Modulator: velocity to volume</text:p>
          </table:table-cell>
          <table:table-cell table:style-name="ce5" office:value-type="string" ns42:value-type="string">
            <text:p>attack, hold,</text:p>
            <text:p>decay, sustain, release</text:p>
          </table:table-cell>
          <table:table-cell table:style-name="ce17" office:value-type="string" ns42:value-type="string">
            <text:p>attack curve</text:p>
          </table:table-cell>
          <table:table-cell table:style-name="ce5" office:value-type="string" ns42:value-type="string">
            <text:p>Internal Modulator</text:p>
          </table:table-cell>
          <table:table-cell table:style-name="ce4"/>
          <table:table-cell table:style-name="ce5" office:value-type="string" ns42:value-type="string">
            <text:p>Internal Modulator</text:p>
          </table:table-cell>
          <table:table-cell table:style-name="ce17" office:value-type="string" ns42:value-type="string">
            <text:p>pitchbend to pitch</text:p>
          </table:table-cell>
          <table:table-cell table:style-name="ce17" office:value-type="string" ns42:value-type="string">
            <text:p>-pitchbend to pitch</text:p>
          </table:table-cell>
          <table:table-cell table:style-name="ce5" office:value-type="string" ns42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ns42:value-type="string">
            <text:p>TODO Understand insert effects (also in K2)</text:p>
          </table:table-cell>
          <table:table-cell table:style-name="ce17" table:number-columns-repeated="7"/>
          <table:table-cell table:style-name="ce67" table:number-columns-repeated="16323"/>
        </table:table-row>
        <table:table-row table:style-name="ro10">
          <table:table-cell table:style-name="ce3" office:value-type="string" ns42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11" office:value-type="string" ns42:value-type="string" table:number-columns-spanned="1" table:number-rows-spanned="2">
            <text:p>name / soundinfo</text:p>
          </table:table-cell>
          <table:table-cell table:style-name="ce11" office:value-type="string" ns42:value-type="string" table:number-columns-spanned="1" table:number-rows-spanned="2">
            <text:p>tags / soundinfo</text:p>
          </table:table-cell>
          <table:table-cell table:style-name="ce5" office:value-type="string" ns42:value-type="string" table:number-columns-spanned="1" table:number-rows-spanned="2">
            <text:p>author / soundinfo</text:p>
          </table:table-cell>
          <table:table-cell table:style-name="ce17" office:value-type="string" ns42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Root Key</text:p>
          </table:table-cell>
          <table:table-cell table:style-name="ce5" office:value-type="string" ns42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ns42:value-type="string" table:number-columns-spanned="1" table:number-rows-spanned="2">
            <text:p>only globally</text:p>
          </table:table-cell>
          <table:table-cell table:style-name="ce5" office:value-type="string" ns42:value-type="string" table:number-columns-spanned="1" table:number-rows-spanned="2">
            <text:p>Gain</text:p>
          </table:table-cell>
          <table:table-cell table:style-name="ce5" office:value-type="string" ns42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End</text:p>
          </table:table-cell>
          <table:table-cell table:style-name="ce5" office:value-type="string" ns42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ns42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ns42:value-type="string">
            <text:p>Pitchbend (only 1.5+)</text:p>
          </table:table-cell>
          <table:table-cell table:style-name="ce17" office:value-type="string" ns42:value-type="string">
            <text:p>-Pitchbend (only 1.5+)</text:p>
          </table:table-cell>
          <table:table-cell table:style-name="ce5" office:value-type="string" ns42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2, BP2, HP2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ns42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ns42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ns42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1">
          <table:table-cell table:style-name="ce3" office:value-type="string" ns42:value-type="string" table:number-columns-spanned="1" table:number-rows-spanned="2">
            <text:p>Native Instruments Maschine 2 / 3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11" office:value-type="string" ns42:value-type="string" table:number-columns-spanned="1" table:number-rows-spanned="2">
            <text:p>name / soundinfo</text:p>
          </table:table-cell>
          <table:table-cell table:style-name="ce11" office:value-type="string" ns42:value-type="string" table:number-columns-spanned="1" table:number-rows-spanned="2">
            <text:p>tags / soundinfo</text:p>
          </table:table-cell>
          <table:table-cell table:style-name="ce5" office:value-type="string" ns42:value-type="string" table:number-columns-spanned="1" table:number-rows-spanned="2">
            <text:p>author / soundinfo</text:p>
          </table:table-cell>
          <table:table-cell table:style-name="ce17" office:value-type="string" ns42:value-type="string">
            <text:p>from file</text:p>
          </table:table-cell>
          <table:table-cell table:style-name="ce5" office:value-type="string" ns42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Root Key</text:p>
          </table:table-cell>
          <table:table-cell table:style-name="ce5" office:value-type="string" ns42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ns42:value-type="string" table:number-columns-spanned="1" table:number-rows-spanned="2">
            <text:p>only globally</text:p>
          </table:table-cell>
          <table:table-cell table:style-name="ce5" office:value-type="string" ns42:value-type="string" table:number-columns-spanned="1" table:number-rows-spanned="2">
            <text:p>Gain</text:p>
          </table:table-cell>
          <table:table-cell table:style-name="ce5" office:value-type="string" ns42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End</text:p>
          </table:table-cell>
          <table:table-cell table:style-name="ce5" office:value-type="string" ns42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ns42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7" office:value-type="string" ns42:value-type="string" table:number-columns-spanned="1" table:number-rows-spanned="2">
            <text:p>-Pitchbend</text:p>
          </table:table-cell>
          <table:table-cell table:style-name="ce5" office:value-type="string" ns42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2, BP2, HP2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ns42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2">
          <table:covered-table-cell table:style-name="ce5"/>
          <table:table-cell table:style-name="ce68" office:value-type="string" ns42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ns42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Omnisphere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zmap / prt_omn</text:p>
          </table:table-cell>
          <table:table-cell table:style-name="ce14" office:value-type="string" ns42:value-type="string" table:number-columns-spanned="1" table:number-rows-spanned="2">
            <text:p>omnisphere</text:p>
          </table:table-cell>
          <table:table-cell table:style-name="ce14" office:value-type="string" ns42:value-type="string" table:number-columns-spanned="1" table:number-rows-spanned="2">
            <text:p>mlt_omn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11" office:value-type="string" ns42:value-type="string" table:number-columns-spanned="1" table:number-rows-spanned="2">
            <text:p>Name</text:p>
          </table:table-cell>
          <table:table-cell table:style-name="ce11" office:value-type="string" ns42:value-type="string" table:number-columns-spanned="1" table:number-rows-spanned="2">
            <text:p>Type</text:p>
          </table:table-cell>
          <table:table-cell table:style-name="ce11" office:value-type="string" ns42:value-type="string" table:number-columns-spanned="1" table:number-rows-spanned="2">
            <text:p>Author</text:p>
          </table:table-cell>
          <table:table-cell table:style-name="ce17" office:value-type="string" ns42:value-type="string">
            <text:p>from file</text:p>
          </table:table-cell>
          <table:table-cell table:style-name="ce11" office:value-type="string" ns42:value-type="string" table:number-columns-spanned="1" table:number-rows-spanned="2">
            <text:p>Description</text:p>
          </table:table-cell>
          <table:table-cell table:style-name="ce11" office:value-type="string" ns42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ns42:value-type="string">
            <text:p>sub-layer</text:p>
          </table:table-cell>
          <table:table-cell table:style-name="ce11" office:value-type="string" ns42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MultisampleZone</text:p>
          </table:table-cell>
          <table:table-cell table:style-name="ce11" office:value-type="string" ns42:value-type="string" table:number-columns-spanned="1" table:number-rows-spanned="2">
            <text:p>HitKind / BaseNote</text:p>
          </table:table-cell>
          <table:table-cell table:style-name="ce11" office:value-type="string" ns42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SMPL-Chunk</text:p>
          </table:table-cell>
          <table:table-cell table:style-name="ce5" office:value-type="string" ns42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ENVPARAMS attk, hold, decy, sust, rels</text:p>
          </table:table-cell>
          <table:table-cell table:style-name="ce11" office:value-type="string" ns42:value-type="string" table:number-columns-spanned="1" table:number-rows-spanned="2">
            <text:p>Attack, Decay, Release slope („c“)</text:p>
          </table:table-cell>
          <table:table-cell table:style-name="ce11" office:value-type="string" ns42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ns42:value-type="string">
            <text:p>pbup</text:p>
          </table:table-cell>
          <table:table-cell table:style-name="ce5" office:value-type="string" ns42:value-type="string">
            <text:p>pbdn</text:p>
          </table:table-cell>
          <table:table-cell table:style-name="ce11" office:value-type="string" ns42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ns42:value-type="string" table:number-columns-spanned="1" table:number-rows-spanned="2">
            <text:p>Lowpass , Highpass, Bandpass, Notch</text:p>
          </table:table-cell>
          <table:table-cell table:style-name="ce11" office:value-type="string" ns42:value-type="string" table:number-columns-spanned="1" table:number-rows-spanned="2">
            <text:p>1,2,3,4,6,8</text:p>
          </table:table-cell>
          <table:table-cell table:style-name="ce11" office:value-type="string" ns42:value-type="string" table:number-columns-spanned="1" table:number-rows-spanned="2">
            <text:p>freq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11" office:value-type="string" ns42:value-type="string" table:number-columns-spanned="1" table:number-rows-spanned="2">
            <text:p>FENVPARAMS attk, hold, decy, sust, rels</text:p>
          </table:table-cell>
          <table:table-cell table:style-name="ce11" office:value-type="string" ns42:value-type="string" table:number-columns-spanned="1" table:number-rows-spanned="2">
            <text:p>velsens</text:p>
          </table:table-cell>
          <table:table-cell table:style-name="ce11" office:value-type="string" ns42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ns42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ns42:value-type="string" table:number-columns-spanned="1" table:number-rows-spanned="2">
            <text:p>Polyend Tracker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ns42:value-type="float">
            <text:p>16</text:p>
          </table:table-cell>
          <table:table-cell table:style-name="ce10" office:value-type="string" ns42:value-type="string">
            <text:p>44.1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>
            <text:p>Filename</text:p>
          </table:table-cell>
          <table:table-cell table:style-name="ce24" office:value-type="float" office:value="60" ns42:value-type="float" table:number-columns-spanned="1" table:number-rows-spanned="2">
            <text:p>60</text:p>
          </table:table-cell>
          <table:table-cell table:style-name="ce24" office:value-type="string" ns42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ns42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ns42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ns42:value-type="string" table:number-columns-spanned="1" table:number-rows-spanned="2">
            <text:p>Lowpass , Highpass, Bandpass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ns42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ns42:value-type="string" table:number-columns-spanned="1" table:number-rows-spanned="2">
            <text:p>Propellerhead Reason NN-XT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DESC: patchName</text:p>
          </table:table-cell>
          <table:table-cell table:style-name="ce79" office:value-type="string" ns42:value-type="string">
            <text:p>from filename</text:p>
          </table:table-cell>
          <table:table-cell table:style-name="ce11" office:value-type="string" ns42:value-type="string" table:number-columns-spanned="1" table:number-rows-spanned="2">
            <text:p>AUTHOR: auth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AUTHOR: authorURL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Zone</text:p>
          </table:table-cell>
          <table:table-cell table:style-name="ce11" office:value-type="string" ns42:value-type="string" table:number-columns-spanned="1" table:number-rows-spanned="2">
            <text:p>rootKey</text:p>
          </table:table-cell>
          <table:table-cell table:style-name="ce11" office:value-type="string" ns42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ocityRangeStart / <text:s/>velocityRangeEnd</text:p>
          </table:table-cell>
          <table:table-cell table:style-name="ce11" office:value-type="string" ns42:value-type="string" table:number-columns-spanned="1" table:number-rows-spanned="2">
            <text:p>velocityFadeIn / velocityFadeOut</text:p>
          </table:table-cell>
          <table:table-cell table:style-name="ce11" office:value-type="string" ns42:value-type="string" table:number-columns-spanned="1" table:number-rows-spanned="2">
            <text:p>sampleStart</text:p>
          </table:table-cell>
          <table:table-cell table:style-name="ce11" office:value-type="string" ns42:value-type="string" table:number-columns-spanned="1" table:number-rows-spanned="2">
            <text:p>sampleEnd</text:p>
          </table:table-cell>
          <table:table-cell table:style-name="ce11" office:value-type="string" ns42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playMode</text:p>
          </table:table-cell>
          <table:table-cell table:style-name="ce11" office:value-type="string" ns42:value-type="string" table:number-columns-spanned="1" table:number-rows-spanned="2">
            <text:p>ampEnvGain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playMode</text:p>
          </table:table-cell>
          <table:table-cell table:style-name="ce11" office:value-type="string" ns42:value-type="string" table:number-columns-spanned="1" table:number-rows-spanned="2">
            <text:p>playMode == 3</text:p>
          </table:table-cell>
          <table:table-cell table:style-name="ce11" office:value-type="string" ns42:value-type="string" table:number-columns-spanned="1" table:number-rows-spanned="2">
            <text:p>sampleLoopStart</text:p>
          </table:table-cell>
          <table:table-cell table:style-name="ce11" office:value-type="string" ns42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ns42:value-type="string" table:number-columns-spanned="1" table:number-rows-spanned="2">
            <text:p>pitchWheelRange</text:p>
          </table:table-cell>
          <table:table-cell table:style-name="ce17" office:value-type="string" ns42:value-type="string" table:number-columns-spanned="1" table:number-rows-spanned="2">
            <text:p>pitchWheelRange</text:p>
          </table:table-cell>
          <table:table-cell table:style-name="ce11" office:value-type="string" ns42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ns42:value-type="string" table:number-columns-spanned="1" table:number-rows-spanned="2">
            <text:p>filterIsOn</text:p>
          </table:table-cell>
          <table:table-cell table:style-name="ce5" office:value-type="string" ns42:value-type="string" table:number-columns-spanned="1" table:number-rows-spanned="2">
            <text:p>FilterType: Lowpass, Highpass, Bandpass, Notch</text:p>
          </table:table-cell>
          <table:table-cell table:style-name="ce11" office:value-type="string" ns42:value-type="string" table:number-columns-spanned="1" table:number-rows-spanned="2">
            <text:p>LP: 1, 2, 4</text:p>
          </table:table-cell>
          <table:table-cell table:style-name="ce11" office:value-type="string" ns42:value-type="string" table:number-columns-spanned="1" table:number-rows-spanned="2">
            <text:p>filterFreq</text:p>
          </table:table-cell>
          <table:table-cell table:style-name="ce11" office:value-type="string" ns42:value-type="string" table:number-columns-spanned="1" table:number-rows-spanned="2">
            <text:p>filterResonance</text:p>
          </table:table-cell>
          <table:table-cell table:style-name="ce11" office:value-type="string" ns42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ns42:value-type="string" table:number-columns-spanned="1" table:number-rows-spanned="2">
            <text:p>VelocityToFilterFreq</text:p>
          </table:table-cell>
          <table:table-cell table:style-name="ce11" office:value-type="string" ns42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Renoise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ns42:value-type="string" table:number-columns-spanned="1" table:number-rows-spanned="2">
            <text:p>All (WAV, FLAC, AIF)</text:p>
          </table:table-cell>
          <table:table-cell table:style-name="ce11" office:value-type="string" ns42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ns42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BaseNote</text:p>
          </table:table-cell>
          <table:table-cell table:style-name="ce11" office:value-type="string" ns42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ning</text:p>
          </table:table-cell>
          <table:table-cell table:style-name="ce17" office:value-type="string" ns42:value-type="string" table:number-columns-spanned="1" table:number-rows-spanned="2">
            <text:p>Round robin </text:p>
            <text:p>from velocity</text:p>
          </table:table-cell>
          <table:table-cell table:style-name="ce11" office:value-type="string" ns42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ns42:value-type="string">
            <text:p>Forwards / Backwards / Pingpong</text:p>
          </table:table-cell>
          <table:table-cell table:style-name="ce5" office:value-type="string" ns42:value-type="string">
            <text:p>LoopRelease</text:p>
          </table:table-cell>
          <table:table-cell table:style-name="ce5" office:value-type="string" ns42:value-type="string">
            <text:p>LoopStart</text:p>
          </table:table-cell>
          <table:table-cell table:style-name="ce5" office:value-type="string" ns42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ns42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ns42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ns42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3"/>
          <table:table-cell table:style-name="ce5" office:value-type="string" ns42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>
          <table:table-cell table:style-name="ce3">
            <text:p>Roland MC-707, MC-101</text:p>
          </table:table-cell>
          <table:table-cell table:style-name="ce68">
            <text:p>Read</text:p>
          </table:table-cell>
          <table:table-cell table:style-name="ce5">
            <text:p>mpj</text:p>
          </table:table-cell>
          <table:table-cell table:style-name="ce5">
            <text:p>User + clip banks</text:p>
          </table:table-cell>
          <table:table-cell table:style-name="ce5">
            <text:p>Kit key map</text:p>
          </table:table-cell>
          <table:table-cell table:style-name="ce17">
            <text:p>16</text:p>
          </table:table-cell>
          <table:table-cell table:style-name="ce17">
            <text:p>44.1 kHz</text:p>
          </table:table-cell>
          <table:table-cell table:style-name="ce4"/>
          <table:table-cell table:style-name="ce17"/>
          <table:table-cell table:style-name="ce5">
            <text:p>Nam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82"/>
          <table:table-cell table:style-name="ce4"/>
          <table:table-cell table:style-name="ce4"/>
          <table:table-cell table:style-name="ce81"/>
          <table:table-cell table:style-name="ce5">
            <text:p>SMPd sample</text:p>
          </table:table-cell>
          <table:table-cell table:style-name="ce5">
            <text:p>Original key</text:p>
          </table:table-cell>
          <table:table-cell table:style-name="ce5">
            <text:p>Kit key map</text:p>
          </table:table-cell>
          <table:table-cell table:style-name="ce23"/>
          <table:table-cell table:style-name="ce23"/>
          <table:table-cell table:style-name="ce23"/>
          <table:table-cell table:style-name="ce5">
            <text:p>Start point</text:p>
          </table:table-cell>
          <table:table-cell table:style-name="ce5">
            <text:p>End point</text:p>
          </table:table-cell>
          <table:table-cell table:style-name="ce23"/>
          <table:table-cell table:style-name="ce23"/>
          <table:table-cell table:style-name="ce23"/>
          <table:table-cell table:style-name="ce5">
            <text:p>Level</text:p>
          </table:table-cell>
          <table:table-cell table:style-name="ce23"/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Forward / one-shot</text:p>
          </table:table-cell>
          <table:table-cell table:style-name="ce23"/>
          <table:table-cell table:style-name="ce5">
            <text:p>Loop start</text:p>
          </table:table-cell>
          <table:table-cell table:style-name="ce5">
            <text:p>Loop end</text:p>
          </table:table-cell>
          <table:table-cell table:style-name="ce23"/>
          <table:table-cell table:style-name="ce23"/>
          <table:table-cell table:style-name="ce81"/>
          <table:table-cell table:style-name="ce23"/>
          <table:table-cell table:style-name="ce23"/>
          <table:table-cell table:style-name="ce23"/>
          <table:table-cell table:style-name="ce23"/>
          <table:table-cell table:style-name="ce85"/>
          <table:table-cell table:style-name="ce23"/>
          <table:table-cell table:style-name="ce23"/>
          <table:table-cell table:style-name="ce23"/>
          <table:table-cell table:style-name="ce23"/>
          <table:table-cell table:style-name="ce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</table:table-row>
        <table:table-row>
          <table:table-cell table:style-name="ce68">
            <text:p>Write</text:p>
          </table:table-cell>
          <table:table-cell table:style-name="ce4"/>
          <table:table-cell table:style-name="ce5">
            <text:p>mpj</text:p>
          </table:table-cell>
          <table:table-cell table:style-name="ce5">
            <text:p>User banks of one project</text:p>
          </table:table-cell>
          <table:table-cell table:style-name="ce5">
            <text:p>Kit key map</text:p>
          </table:table-cell>
          <table:table-cell table:style-name="ce17">
            <text:p>16</text:p>
          </table:table-cell>
          <table:table-cell table:style-name="ce17">
            <text:p>44.1 kHz</text:p>
          </table:table-cell>
          <table:table-cell table:style-name="ce4"/>
          <table:table-cell table:style-name="ce17"/>
          <table:table-cell table:style-name="ce5">
            <text:p>Nam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82"/>
          <table:table-cell table:style-name="ce4"/>
          <table:table-cell table:style-name="ce4"/>
          <table:table-cell table:style-name="ce81"/>
          <table:table-cell table:style-name="ce5">
            <text:p>SMPd sample</text:p>
          </table:table-cell>
          <table:table-cell table:style-name="ce5">
            <text:p>Original key</text:p>
          </table:table-cell>
          <table:table-cell table:style-name="ce5">
            <text:p>Kit key map (A0-C8)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5">
            <text:p>End point</text:p>
          </table:table-cell>
          <table:table-cell table:style-name="ce23"/>
          <table:table-cell table:style-name="ce23"/>
          <table:table-cell table:style-name="ce23"/>
          <table:table-cell table:style-name="ce5">
            <text:p>Level</text:p>
          </table:table-cell>
          <table:table-cell table:style-name="ce23"/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Forward / one-shot</text:p>
          </table:table-cell>
          <table:table-cell table:style-name="ce23"/>
          <table:table-cell table:style-name="ce5">
            <text:p>Loop start</text:p>
          </table:table-cell>
          <table:table-cell table:style-name="ce5">
            <text:p>Loop end</text:p>
          </table:table-cell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TVA envelope (T1-T4 / L1-L3, tones)</text:p>
          </table:table-cell>
          <table:table-cell table:style-name="ce23"/>
          <table:table-cell table:style-name="ce23"/>
          <table:table-cell table:style-name="ce85"/>
          <table:table-cell table:style-name="ce23"/>
          <table:table-cell table:style-name="ce23"/>
          <table:table-cell table:style-name="ce23"/>
          <table:table-cell table:style-name="ce23"/>
          <table:table-cell table:style-name="ce4"/>
          <table:table-cell table:style-name="ce5"/>
          <table:table-cell table:style-name="ce5">
            <text:p>LPF, BPF, HPF (tones)</text:p>
          </table:table-cell>
          <table:table-cell table:style-name="ce23"/>
          <table:table-cell table:style-name="ce5">
            <text:p>Cutoff</text:p>
          </table:table-cell>
          <table:table-cell table:style-name="ce5">
            <text:p>Resonance</text:p>
          </table:table-cell>
          <table:table-cell table:style-name="ce23"/>
          <table:table-cell table:style-name="ce23"/>
          <table:table-cell table:style-name="ce23"/>
        </table:table-row>
        <table:table-row table:style-name="ro1">
          <table:table-cell table:style-name="ce3" office:value-type="string" ns42:value-type="string" table:number-columns-spanned="1" table:number-rows-spanned="2">
            <text:p>Roland MV-8000, MV-8800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mv0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ns42:value-type="string">
            <text:p>16</text:p>
          </table:table-cell>
          <table:table-cell table:style-name="ce17" office:value-type="string" ns42:value-type="string">
            <text:p>44.1 kHz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5" office:value-type="string" ns42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17" office:value-type="string" ns42:value-type="string">
            <text:p>from filename</text:p>
          </table:table-cell>
          <table:table-cell table:style-name="ce82"/>
          <table:table-cell table:style-name="ce79" office:value-type="string" ns42:value-type="string">
            <text:p>By Velocity</text:p>
          </table:table-cell>
          <table:table-cell table:style-name="ce23"/>
          <table:table-cell table:style-name="ce81"/>
          <table:table-cell table:style-name="ce5" office:value-type="string" ns42:value-type="string" table:number-columns-spanned="1" table:number-rows-spanned="2">
            <text:p>SMT slot / sample</text:p>
          </table:table-cell>
          <table:table-cell table:style-name="ce5" office:value-type="string" ns42:value-type="string" table:number-columns-spanned="1" table:number-rows-spanned="2">
            <text:p>Sample root key</text:p>
          </table:table-cell>
          <table:table-cell table:style-name="ce5" office:value-type="string" ns42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Velo Range Lower / Upper</text:p>
          </table:table-cell>
          <table:table-cell table:style-name="ce5" office:value-type="string" ns42:value-type="string" table:number-columns-spanned="1" table:number-rows-spanned="2">
            <text:p>Velo Fade Lower / Upper</text:p>
          </table:table-cell>
          <table:table-cell table:style-name="ce5" office:value-type="string" ns42:value-type="string" table:number-columns-spanned="1" table:number-rows-spanned="2">
            <text:p>Start point</text:p>
          </table:table-cell>
          <table:table-cell table:style-name="ce5" office:value-type="string" ns42:value-type="string" table:number-columns-spanned="1" table:number-rows-spanned="2">
            <text:p>End point</text:p>
          </table:table-cell>
          <table:table-cell table:style-name="ce5" office:value-type="string" ns42:value-type="string" table:number-columns-spanned="1" table:number-rows-spanned="2">
            <text:p>SMT Coarse / Fine Tune</text:p>
          </table:table-cell>
          <table:table-cell table:style-name="ce17" office:value-type="string" ns42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SMT / Partial Level</text:p>
          </table:table-cell>
          <table:table-cell table:style-name="ce5" office:value-type="string" ns42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TVA envelope (T1-T4 / L1-L3)</text:p>
          </table:table-cell>
          <table:table-cell table:style-name="ce23"/>
          <table:table-cell table:style-name="ce17" office:value-type="string" ns42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F, BPF, HPF</text:p>
          </table:table-cell>
          <table:table-cell table:style-name="ce17" office:value-type="string" ns42:value-type="string" table:number-columns-spanned="1" table:number-rows-spanned="2">
            <text:p>Undocumented, mapped as 4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Roland S-50, S-330, S-550, W-30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>
            <text:p>out, sdk</text:p>
          </table:table-cell>
          <table:table-cell table:style-name="ce72" table:number-columns-repeated="2"/>
          <table:table-cell table:style-name="ce17" office:value-type="float" office:value="12" ns42:value-type="float">
            <text:p>12</text:p>
          </table:table-cell>
          <table:table-cell table:style-name="ce17" office:value-type="string" ns42:value-type="string">
            <text:p>15/30</text:p>
          </table:table-cell>
          <table:table-cell table:style-name="ce4"/>
          <table:table-cell table:style-name="ce17"/>
          <table:table-cell table:style-name="ce5" office:value-type="string" ns42:value-type="string">
            <text:p>Patch 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>
            <text:p>Tone</text:p>
          </table:table-cell>
          <table:table-cell table:style-name="ce5" office:value-type="string" ns42:value-type="string">
            <text:p>Original Key</text:p>
          </table:table-cell>
          <table:table-cell table:style-name="ce5" office:value-type="string" ns42:value-type="string">
            <text:p>Key-to-tone</text:p>
          </table:table-cell>
          <table:table-cell table:style-name="ce23"/>
          <table:table-cell table:style-name="ce20" office:value-type="string" ns42:value-type="string">
            <text:p>2 velocity layers with 1 split point</text:p>
          </table:table-cell>
          <table:table-cell table:style-name="ce23"/>
          <table:table-cell table:style-name="ce5" office:value-type="string" ns42:value-type="string">
            <text:p>startpoint</text:p>
          </table:table-cell>
          <table:table-cell table:style-name="ce5" office:value-type="string" ns42:value-type="string">
            <text:p>endpoint</text:p>
          </table:table-cell>
          <table:table-cell table:style-name="ce5" office:value-type="string" ns42:value-type="string">
            <text:p>Patch Octave Shift / </text:p>
            <text:p>Tone Transpose / Fine Tune</text:p>
          </table:table-cell>
          <table:table-cell table:style-name="ce17" office:value-type="string" ns42:value-type="string">
            <text:p>On/Off</text:p>
          </table:table-cell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Forward / alternating</text:p>
          </table:table-cell>
          <table:table-cell table:style-name="ce72"/>
          <table:table-cell table:style-name="ce5" office:value-type="string" ns42:value-type="string">
            <text:p>looppoint</text:p>
          </table:table-cell>
          <table:table-cell table:style-name="ce5" office:value-type="string" ns42:value-type="string">
            <text:p>looplength</text:p>
          </table:table-cell>
          <table:table-cell table:style-name="ce23"/>
          <table:table-cell table:style-name="ce5" office:value-type="string" ns42:value-type="string">
            <text:p>looptuning</text:p>
          </table:table-cell>
          <table:table-cell table:style-name="ce81"/>
          <table:table-cell table:style-name="ce5"/>
          <table:table-cell table:style-name="ce5" office:value-type="string" ns42:value-type="string">
            <text:p>8-stage envelope</text:p>
          </table:table-cell>
          <table:table-cell table:style-name="ce23"/>
          <table:table-cell table:style-name="ce23" office:value-type="string" ns42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ns42:value-type="string">
            <text:p>bendRange</text:p>
          </table:table-cell>
          <table:table-cell table:style-name="ce17" office:value-type="string" ns42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ns42:value-type="string">
            <text:p>Low Pass</text:p>
          </table:table-cell>
          <table:table-cell table:style-name="ce17" office:value-type="string" ns42:value-type="string">
            <text:p>Undocumented, </text:p>
            <text:p>Likely 2 or 4</text:p>
          </table:table-cell>
          <table:table-cell table:style-name="ce5" office:value-type="string" ns42:value-type="string">
            <text:p>cutoff</text:p>
          </table:table-cell>
          <table:table-cell table:style-name="ce5" office:value-type="string" ns42:value-type="string">
            <text:p>resonance</text:p>
          </table:table-cell>
          <table:table-cell table:style-name="ce5" office:value-type="string" ns42:value-type="string">
            <text:p>8-stage envelope</text:p>
          </table:table-cell>
          <table:table-cell table:style-name="ce23" office:value-type="string" ns42:value-type="string">
            <text:p>only for speed</text:p>
          </table:table-cell>
          <table:table-cell table:style-name="ce5" office:value-type="string" ns42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Roland S-750, S-760, S-770, DJ-70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>
            <text:p>out, img, iso</text:p>
          </table:table-cell>
          <table:table-cell table:style-name="ce72"/>
          <table:table-cell table:style-name="ce72" office:value-type="string" ns42:value-type="string">
            <text:p>TODO </text:p>
          </table:table-cell>
          <table:table-cell table:style-name="ce17" office:value-type="float" office:value="16" ns42:value-type="float">
            <text:p>16</text:p>
          </table:table-cell>
          <table:table-cell table:style-name="ce17" office:value-type="string" ns42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ns42:value-type="string">
            <text:p>Patch 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>
            <text:p>Partial/Sample</text:p>
          </table:table-cell>
          <table:table-cell table:style-name="ce5" office:value-type="string" ns42:value-type="string">
            <text:p>Original Key</text:p>
          </table:table-cell>
          <table:table-cell table:style-name="ce5" office:value-type="string" ns42:value-type="string">
            <text:p>Patch keys</text:p>
          </table:table-cell>
          <table:table-cell table:style-name="ce23"/>
          <table:table-cell table:style-name="ce20" office:value-type="string" ns42:value-type="string">
            <text:p>4 velocity layers</text:p>
          </table:table-cell>
          <table:table-cell table:style-name="ce5" office:value-type="string" ns42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ns42:value-type="string">
            <text:p>start address</text:p>
          </table:table-cell>
          <table:table-cell table:style-name="ce23"/>
          <table:table-cell table:style-name="ce5" office:value-type="string" ns42:value-type="string">
            <text:p><text:span text:style-name="T2">Patch/Partial/Sample</text:span></text:p>
            <text:p>Coarse/Fine Tune</text:p>
          </table:table-cell>
          <table:table-cell table:style-name="ce17" office:value-type="string" ns42:value-type="string">
            <text:p>Pitch KF</text:p>
          </table:table-cell>
          <table:table-cell table:style-name="ce23"/>
          <table:table-cell table:style-name="ce5" office:value-type="string" ns42:value-type="string">
            <text:p>Patch/Partial/Sample/Mix</text:p>
            <text:p>Level</text:p>
          </table:table-cell>
          <table:table-cell table:style-name="ce5" office:value-type="string" ns42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forward / backward / alternating</text:p>
          </table:table-cell>
          <table:table-cell table:style-name="ce5" office:value-type="string" ns42:value-type="string">
            <text:p>loopMode == 1</text:p>
          </table:table-cell>
          <table:table-cell table:style-name="ce5" office:value-type="string" ns42:value-type="string">
            <text:p>loop start address</text:p>
          </table:table-cell>
          <table:table-cell table:style-name="ce5" office:value-type="string" ns42:value-type="string">
            <text:p>loop end address</text:p>
          </table:table-cell>
          <table:table-cell table:style-name="ce5" office:value-type="string" ns42:value-type="string">
            <text:p>loop start fine + </text:p>
            <text:p>loop end fine</text:p>
          </table:table-cell>
          <table:table-cell table:style-name="ce5" office:value-type="string" ns42:value-type="string">
            <text:p>Loop Tune</text:p>
          </table:table-cell>
          <table:table-cell table:style-name="ce81"/>
          <table:table-cell table:style-name="ce5"/>
          <table:table-cell table:style-name="ce5" office:value-type="string" ns42:value-type="string">
            <text:p>4-stage envelope</text:p>
          </table:table-cell>
          <table:table-cell table:style-name="ce23"/>
          <table:table-cell table:style-name="ce17" office:value-type="string" ns42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ns42:value-type="string">
            <text:p>Pitch Ctrl Up</text:p>
          </table:table-cell>
          <table:table-cell table:style-name="ce5" office:value-type="string" ns42:value-type="string">
            <text:p>Pitch Ctrl Down</text:p>
          </table:table-cell>
          <table:table-cell table:style-name="ce17" office:value-type="string" ns42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ns42:value-type="string">
            <text:p>LPF, HPF, BPF</text:p>
          </table:table-cell>
          <table:table-cell table:style-name="ce17" office:value-type="string" ns42:value-type="string">
            <text:p>Undocumented, </text:p>
            <text:p>Likely 2 or 4</text:p>
          </table:table-cell>
          <table:table-cell table:style-name="ce5" office:value-type="string" ns42:value-type="string">
            <text:p>cutoff</text:p>
          </table:table-cell>
          <table:table-cell table:style-name="ce5" office:value-type="string" ns42:value-type="string">
            <text:p>resonance</text:p>
          </table:table-cell>
          <table:table-cell table:style-name="ce5" office:value-type="string" ns42:value-type="string">
            <text:p>4-stage envelope</text:p>
          </table:table-cell>
          <table:table-cell table:style-name="ce5" office:value-type="string" ns42:value-type="string">
            <text:p>Velocity Curve Type</text:p>
            <text:p>Cutoff velocity sense</text:p>
          </table:table-cell>
          <table:table-cell table:style-name="ce5" office:value-type="string" ns42:value-type="string">
            <text:p>Cutoff KF</text:p>
          </table:table-cell>
          <table:table-cell table:style-name="ce67" table:number-columns-repeated="16323"/>
        </table:table-row>
        <table:table-row>
          <table:table-cell table:style-name="ce3">
            <text:p>Roland ZEN-Core</text:p>
          </table:table-cell>
          <table:table-cell table:style-name="ce68">
            <text:p>Read</text:p>
          </table:table-cell>
          <table:table-cell table:style-name="ce5">
            <text:p>svz</text:p>
          </table:table-cell>
          <table:table-cell table:style-name="ce23"/>
          <table:table-cell table:style-name="ce5">
            <text:p>Key map</text:p>
          </table:table-cell>
          <table:table-cell table:style-name="ce17">
            <text:p>16</text:p>
          </table:table-cell>
          <table:table-cell table:style-name="ce17">
            <text:p>48 kHz</text:p>
          </table:table-cell>
          <table:table-cell table:style-name="ce4"/>
          <table:table-cell table:style-name="ce17"/>
          <table:table-cell table:style-name="ce5">
            <text:p>Nam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82"/>
          <table:table-cell table:style-name="ce4"/>
          <table:table-cell table:style-name="ce4"/>
          <table:table-cell table:style-name="ce81"/>
          <table:table-cell table:style-name="ce5">
            <text:p>SMPd sample</text:p>
          </table:table-cell>
          <table:table-cell table:style-name="ce5">
            <text:p>Original key</text:p>
          </table:table-cell>
          <table:table-cell table:style-name="ce5">
            <text:p>Key map</text:p>
          </table:table-cell>
          <table:table-cell table:style-name="ce23"/>
          <table:table-cell table:style-name="ce23"/>
          <table:table-cell table:style-name="ce23"/>
          <table:table-cell table:style-name="ce5">
            <text:p>Start point</text:p>
          </table:table-cell>
          <table:table-cell table:style-name="ce5">
            <text:p>End point</text:p>
          </table:table-cell>
          <table:table-cell table:style-name="ce17">
            <text:p>Fine tune</text:p>
          </table:table-cell>
          <table:table-cell table:style-name="ce23"/>
          <table:table-cell table:style-name="ce23"/>
          <table:table-cell table:style-name="ce5">
            <text:p>Level</text:p>
          </table:table-cell>
          <table:table-cell table:style-name="ce23"/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Forward / one-shot</text:p>
          </table:table-cell>
          <table:table-cell table:style-name="ce23"/>
          <table:table-cell table:style-name="ce5">
            <text:p>Loop start</text:p>
          </table:table-cell>
          <table:table-cell table:style-name="ce5">
            <text:p>Loop end</text:p>
          </table:table-cell>
          <table:table-cell table:style-name="ce23"/>
          <table:table-cell table:style-name="ce23"/>
          <table:table-cell table:style-name="ce81"/>
          <table:table-cell table:style-name="ce23"/>
          <table:table-cell table:style-name="ce23"/>
          <table:table-cell table:style-name="ce23"/>
          <table:table-cell table:style-name="ce23"/>
          <table:table-cell table:style-name="ce85"/>
          <table:table-cell table:style-name="ce23"/>
          <table:table-cell table:style-name="ce23"/>
          <table:table-cell table:style-name="ce23"/>
          <table:table-cell table:style-name="ce23"/>
          <table:table-cell table:style-name="ce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</table:table-row>
        <table:table-row>
          <table:table-cell table:style-name="ce68">
            <text:p>Write</text:p>
          </table:table-cell>
          <table:table-cell table:style-name="ce4"/>
          <table:table-cell table:style-name="ce5">
            <text:p>svz</text:p>
          </table:table-cell>
          <table:table-cell table:style-name="ce5">
            <text:p>Multi-tone bank</text:p>
          </table:table-cell>
          <table:table-cell table:style-name="ce5">
            <text:p>Key map per tone</text:p>
          </table:table-cell>
          <table:table-cell table:style-name="ce17">
            <text:p>16</text:p>
          </table:table-cell>
          <table:table-cell table:style-name="ce17">
            <text:p>48 kHz</text:p>
          </table:table-cell>
          <table:table-cell table:style-name="ce4"/>
          <table:table-cell table:style-name="ce17"/>
          <table:table-cell table:style-name="ce5">
            <text:p>Nam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82"/>
          <table:table-cell table:style-name="ce4"/>
          <table:table-cell table:style-name="ce4"/>
          <table:table-cell table:style-name="ce81"/>
          <table:table-cell table:style-name="ce5">
            <text:p>SMPd sample</text:p>
          </table:table-cell>
          <table:table-cell table:style-name="ce5">
            <text:p>Original key</text:p>
          </table:table-cell>
          <table:table-cell table:style-name="ce5">
            <text:p>Key map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5">
            <text:p>End point</text:p>
          </table:table-cell>
          <table:table-cell table:style-name="ce23"/>
          <table:table-cell table:style-name="ce23"/>
          <table:table-cell table:style-name="ce23"/>
          <table:table-cell table:style-name="ce5">
            <text:p>Level</text:p>
          </table:table-cell>
          <table:table-cell table:style-name="ce23"/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Forward / one-shot</text:p>
          </table:table-cell>
          <table:table-cell table:style-name="ce23"/>
          <table:table-cell table:style-name="ce5">
            <text:p>Loop start</text:p>
          </table:table-cell>
          <table:table-cell table:style-name="ce5">
            <text:p>Loop end</text:p>
          </table:table-cell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TVA envelope (T1-T4 / L1-L3)</text:p>
          </table:table-cell>
          <table:table-cell table:style-name="ce23"/>
          <table:table-cell table:style-name="ce23"/>
          <table:table-cell table:style-name="ce85"/>
          <table:table-cell table:style-name="ce23"/>
          <table:table-cell table:style-name="ce23"/>
          <table:table-cell table:style-name="ce23"/>
          <table:table-cell table:style-name="ce23"/>
          <table:table-cell table:style-name="ce4"/>
          <table:table-cell table:style-name="ce5"/>
          <table:table-cell table:style-name="ce5">
            <text:p>LPF, BPF, HPF</text:p>
          </table:table-cell>
          <table:table-cell table:style-name="ce23"/>
          <table:table-cell table:style-name="ce5">
            <text:p>Cutoff</text:p>
          </table:table-cell>
          <table:table-cell table:style-name="ce5">
            <text:p>Resonance</text:p>
          </table:table-cell>
          <table:table-cell table:style-name="ce23"/>
          <table:table-cell table:style-name="ce23"/>
          <table:table-cell table:style-name="ce23"/>
        </table:table-row>
        <table:table-row table:style-name="ro8">
          <table:table-cell table:style-name="ce3" office:value-type="string" ns42:value-type="string" table:number-columns-spanned="1" table:number-rows-spanned="2">
            <text:p>Soundfont 2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sf2</text:p>
          </table:table-cell>
          <table:table-cell table:style-name="ce5" office:value-type="string" ns42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ns42:value-type="string">
            <text:p>16, 24</text:p>
          </table:table-cell>
          <table:table-cell table:style-name="ce10" office:value-type="string" ns42:value-type="string">
            <text:p>All</text:p>
          </table:table-cell>
          <table:table-cell table:style-name="ce4"/>
          <table:table-cell table:style-name="ce5"/>
          <table:table-cell table:style-name="ce5" office:value-type="string" ns42:value-type="string" table:number-columns-spanned="1" table:number-rows-spanned="2">
            <text:p>Preset Name</text:p>
          </table:table-cell>
          <table:table-cell table:style-name="ce79" office:value-type="string" ns42:value-type="string">
            <text:p>from filename</text:p>
          </table:table-cell>
          <table:table-cell table:style-name="ce11" office:value-type="string" ns42:value-type="string" table:number-columns-spanned="1" table:number-rows-spanned="2">
            <text:p>INFO: IENG</text:p>
          </table:table-cell>
          <table:table-cell table:style-name="ce11" office:value-type="string" ns42:value-type="string" table:number-columns-spanned="1" table:number-rows-spanned="2">
            <text:p>INFO: ICRD</text:p>
          </table:table-cell>
          <table:table-cell table:style-name="ce5" office:value-type="string" ns42:value-type="string" table:number-columns-spanned="1" table:number-rows-spanned="2">
            <text:p>INFO: ICOP / ICMT / ISFT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Instrument</text:p>
          </table:table-cell>
          <table:table-cell table:style-name="ce5" office:value-type="string" ns42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SHDR</text:p>
          </table:table-cell>
          <table:table-cell table:style-name="ce5" office:value-type="string" ns42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ns42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dwEnd – dwStart</text:p>
          </table:table-cell>
          <table:table-cell table:style-name="ce5" office:value-type="string" ns42:value-type="string" table:number-columns-spanned="1" table:number-rows-spanned="2">
            <text:p>chCorrection</text:p>
          </table:table-cell>
          <table:table-cell table:style-name="ce5" office:value-type="string" ns42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ns42:value-type="string" table:number-columns-spanned="1" table:number-rows-spanned="2">
            <text:p>SHDR</text:p>
          </table:table-cell>
          <table:table-cell table:style-name="ce17" office:value-type="string" ns42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ns42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ns42:value-type="string" table:number-columns-spanned="1" table:number-rows-spanned="2">
            <text:p>dwStartloop</text:p>
          </table:table-cell>
          <table:table-cell table:style-name="ce5" office:value-type="string" ns42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ns42:value-type="string" table:number-columns-spanned="1" table:number-rows-spanned="2">
            <text:p>Pitch Bend Modulator to Fine Tune</text:p>
          </table:table-cell>
          <table:table-cell table:style-name="ce5" office:value-type="string" ns42:value-type="string" table:number-columns-spanned="1" table:number-rows-spanned="2">
            <text:p>Pitch Bend Modulator to Fine Tune</text:p>
          </table:table-cell>
          <table:table-cell table:style-name="ce11" office:value-type="string" ns42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Low Pass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office:value-type="string" ns42:value-type="string" table:number-columns-spanned="1" table:number-rows-spanned="2">
            <text:p>initialFilterFc</text:p>
          </table:table-cell>
          <table:table-cell table:style-name="ce5" office:value-type="string" ns42:value-type="string" table:number-columns-spanned="1" table:number-rows-spanned="2">
            <text:p>initialFilterQ</text:p>
          </table:table-cell>
          <table:table-cell table:style-name="ce11" office:value-type="string" ns42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1" office:value-type="string" ns42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4">
          <table:table-cell table:style-name="ce3" office:value-type="string" ns42:value-type="string" table:number-columns-spanned="1" table:number-rows-spanned="2">
            <text:p>SFZ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global_label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group</text:p>
          </table:table-cell>
          <table:table-cell table:style-name="ce11" office:value-type="string" ns42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Region</text:p>
          </table:table-cell>
          <table:table-cell table:style-name="ce11" office:value-type="string" ns42:value-type="string" table:number-columns-spanned="1" table:number-rows-spanned="2">
            <text:p>key / pitch_keycenter</text:p>
          </table:table-cell>
          <table:table-cell table:style-name="ce11" office:value-type="string" ns42:value-type="string" table:number-columns-spanned="1" table:number-rows-spanned="2">
            <text:p>lokey / hikey</text:p>
          </table:table-cell>
          <table:table-cell table:style-name="ce11" office:value-type="string" ns42:value-type="string" table:number-columns-spanned="1" table:number-rows-spanned="2">
            <text:p>xfin_lokey / xfin_hikey</text:p>
          </table:table-cell>
          <table:table-cell table:style-name="ce11" office:value-type="string" ns42:value-type="string" table:number-columns-spanned="1" table:number-rows-spanned="2">
            <text:p>lovel / hivel</text:p>
          </table:table-cell>
          <table:table-cell table:style-name="ce11" office:value-type="string" ns42:value-type="string" table:number-columns-spanned="1" table:number-rows-spanned="2">
            <text:p>xfout_lokey / xfout_hikey</text:p>
          </table:table-cell>
          <table:table-cell table:style-name="ce11" office:value-type="string" ns42:value-type="string" table:number-columns-spanned="1" table:number-rows-spanned="2">
            <text:p>offse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tune</text:p>
          </table:table-cell>
          <table:table-cell table:style-name="ce11" office:value-type="string" ns42:value-type="string" table:number-columns-spanned="1" table:number-rows-spanned="2">
            <text:p>pitch_keytrack</text:p>
          </table:table-cell>
          <table:table-cell table:style-name="ce11" office:value-type="string" ns42:value-type="string" table:number-columns-spanned="1" table:number-rows-spanned="2">
            <text:p>direction</text:p>
          </table:table-cell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seq_length / seq_position</text:p>
          </table:table-cell>
          <table:table-cell table:style-name="ce11" office:value-type="string" ns42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Region</text:p>
          </table:table-cell>
          <table:table-cell table:style-name="ce11" office:value-type="string" ns42:value-type="string" table:number-columns-spanned="1" table:number-rows-spanned="2">
            <text:p>loop_mode / loop_type</text:p>
          </table:table-cell>
          <table:table-cell table:style-name="ce5" office:value-type="string" ns42:value-type="string" table:number-columns-spanned="1" table:number-rows-spanned="2">
            <text:p>loop_sustain &amp; loop_continuous</text:p>
          </table:table-cell>
          <table:table-cell table:style-name="ce11" office:value-type="string" ns42:value-type="string" table:number-columns-spanned="1" table:number-rows-spanned="2">
            <text:p>loop_start / loopstart</text:p>
          </table:table-cell>
          <table:table-cell table:style-name="ce11" office:value-type="string" ns42:value-type="string" table:number-columns-spanned="1" table:number-rows-spanned="2">
            <text:p>loop_end / loopend</text:p>
          </table:table-cell>
          <table:table-cell table:style-name="ce11" office:value-type="string" ns42:value-type="string" table:number-columns-spanned="1" table:number-rows-spanned="2">
            <text:p>loop_crossfade/loopcrossfade</text:p>
          </table:table-cell>
          <table:table-cell table:style-name="ce11" office:value-type="string" ns42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ns42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ns42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ns42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bend_up</text:p>
          </table:table-cell>
          <table:table-cell table:style-name="ce5" office:value-type="string" ns42:value-type="string" table:number-columns-spanned="1" table:number-rows-spanned="2">
            <text:p>bend_down</text:p>
          </table:table-cell>
          <table:table-cell table:style-name="ce11" office:value-type="string" ns42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f, hpf, bpf, brf</text:p>
          </table:table-cell>
          <table:table-cell table:style-name="ce5" office:value-type="string" ns42:value-type="string" table:number-columns-spanned="1" table:number-rows-spanned="2">
            <text:p>1, 2, 4, 6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11" office:value-type="string" ns42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ns42:value-type="string" table:number-columns-spanned="1" table:number-rows-spanned="2">
            <text:p>fil_veltrack</text:p>
          </table:table-cell>
          <table:table-cell table:style-name="ce11" office:value-type="string" ns42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Synthstrom Deluge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INFO: IENG</text:p>
          </table:table-cell>
          <table:table-cell table:style-name="ce11" office:value-type="string" ns42:value-type="string" table:number-columns-spanned="1" table:number-rows-spanned="2">
            <text:p>INFO: ICRD</text:p>
          </table:table-cell>
          <table:table-cell table:style-name="ce5" office:value-type="string" ns42:value-type="string" table:number-columns-spanned="1" table:number-rows-spanned="2">
            <text:p>INFO: ICOP / ICMT / ISFT</text:p>
          </table:table-cell>
          <table:table-cell table:style-name="ce17" office:value-type="string" ns42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Range</text:p>
          </table:table-cell>
          <table:table-cell table:style-name="ce24" office:value-type="string" ns42:value-type="string" table:number-columns-spanned="1" table:number-rows-spanned="2">
            <text:p>transpose</text:p>
          </table:table-cell>
          <table:table-cell table:style-name="ce24" office:value-type="string" ns42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ns42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tartSamplePos</text:p>
          </table:table-cell>
          <table:table-cell table:style-name="ce11" office:value-type="string" ns42:value-type="string" table:number-columns-spanned="1" table:number-rows-spanned="2">
            <text:p>endSamplePos</text:p>
          </table:table-cell>
          <table:table-cell table:style-name="ce11" office:value-type="string" ns42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ns42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ns42:value-type="string">
            <text:p>startLoopPos</text:p>
          </table:table-cell>
          <table:table-cell table:style-name="ce5" office:value-type="string" ns42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F, HPF</text:p>
          </table:table-cell>
          <table:table-cell table:style-name="ce5" office:value-type="string" ns42:value-type="string" table:number-columns-spanned="1" table:number-rows-spanned="2">
            <text:p>2, 4</text:p>
          </table:table-cell>
          <table:table-cell table:style-name="ce5" office:value-type="string" ns42:value-type="string" table:number-columns-spanned="1" table:number-rows-spanned="2">
            <text:p>frequency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ns42:value-type="string" table:number-columns-spanned="1" table:number-rows-spanned="2">
            <text:p>Envelope2 → Frequency</text:p>
          </table:table-cell>
          <table:table-cell table:style-name="ce11" office:value-type="string" ns42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TAL Sampler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key</text:p>
          </table:table-cell>
          <table:table-cell table:style-name="ce11" office:value-type="string" ns42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startsample</text:p>
          </table:table-cell>
          <table:table-cell table:style-name="ce11" office:value-type="string" ns42:value-type="string" table:number-columns-spanned="1" table:number-rows-spanned="2">
            <text:p>endsample</text:p>
          </table:table-cell>
          <table:table-cell table:style-name="ce11" office:value-type="string" ns42:value-type="string" table:number-columns-spanned="1" table:number-rows-spanned="2">
            <text:p>transpose / detune / samplefinetune</text:p>
          </table:table-cell>
          <table:table-cell table:style-name="ce79" office:value-type="string" ns42:value-type="string" table:number-columns-spanned="1" table:number-rows-spanned="2">
            <text:p>track (only on/off)</text:p>
          </table:table-cell>
          <table:table-cell table:style-name="ce11" office:value-type="string" ns42:value-type="string" table:number-columns-spanned="1" table:number-rows-spanned="2">
            <text:p>reverse</text:p>
          </table:table-cell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loopenabled</text:p>
          </table:table-cell>
          <table:table-cell table:style-name="ce11" office:value-type="string" ns42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loopstartsample</text:p>
          </table:table-cell>
          <table:table-cell table:style-name="ce11" office:value-type="string" ns42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ns42:value-type="string" table:number-columns-spanned="1" table:number-rows-spanned="2">
            <text:p>globalpitchbendrange</text:p>
          </table:table-cell>
          <table:table-cell table:style-name="ce17" office:value-type="string" ns42:value-type="string" table:number-columns-spanned="1" table:number-rows-spanned="2">
            <text:p>globalpitchbendrange</text:p>
          </table:table-cell>
          <table:table-cell table:style-name="ce11" office:value-type="string" ns42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ns42:value-type="string" table:number-columns-spanned="1" table:number-rows-spanned="2">
            <text:p>Lowpass, Highpass, Bandpass, Bandstop</text:p>
          </table:table-cell>
          <table:table-cell table:style-name="ce5" office:value-type="string" ns42:value-type="string" table:number-columns-spanned="1" table:number-rows-spanned="2">
            <text:p>1, 2, 4</text:p>
          </table:table-cell>
          <table:table-cell table:style-name="ce5" office:value-type="string" ns42:value-type="string" table:number-columns-spanned="1" table:number-rows-spanned="2">
            <text:p>filtercutoff</text:p>
          </table:table-cell>
          <table:table-cell table:style-name="ce5" office:value-type="string" ns42:value-type="string" table:number-columns-spanned="1" table:number-rows-spanned="2">
            <text:p>filterresonance</text:p>
          </table:table-cell>
          <table:table-cell table:style-name="ce5" office:value-type="string" ns42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ns42:value-type="string" table:number-columns-spanned="1" table:number-rows-spanned="2">
            <text:p>ModMatrix: Vel → Cutoff</text:p>
          </table:table-cell>
          <table:table-cell table:style-name="ce11" office:value-type="string" ns42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5">
          <table:table-cell table:style-name="ce3" office:value-type="string" ns42:value-type="string" table:number-columns-spanned="1" table:number-rows-spanned="2">
            <text:p>TX16Wx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16" office:value-type="string" ns42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 / Icon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group</text:p>
          </table:table-cell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</text:p>
          </table:table-cell>
          <table:table-cell table:style-name="ce11" office:value-type="string" ns42:value-type="string" table:number-columns-spanned="1" table:number-rows-spanned="2">
            <text:p>Bounds: low-key / high-key / lowkey / highkey</text:p>
          </table:table-cell>
          <table:table-cell table:style-name="ce11" office:value-type="string" ns42:value-type="string" table:number-columns-spanned="1" table:number-rows-spanned="2">
            <text:p>Fade-Bounds: low-key / high-key / lowkey / highkey</text:p>
          </table:table-cell>
          <table:table-cell table:style-name="ce11" office:value-type="string" ns42:value-type="string" table:number-columns-spanned="1" table:number-rows-spanned="2">
            <text:p>Bounds: low-vel / high-vel</text:p>
          </table:table-cell>
          <table:table-cell table:style-name="ce11" office:value-type="string" ns42:value-type="string" table:number-columns-spanned="1" table:number-rows-spanned="2">
            <text:p>Fade-Bounds: low-vel / high-vel</text:p>
          </table:table-cell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everse</text:p>
          </table:table-cell>
          <table:table-cell table:style-name="ce11" office:value-type="string" ns42:value-type="string" table:number-columns-spanned="1" table:number-rows-spanned="2">
            <text:p>group: volume + region: attenuation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mode</text:p>
          </table:table-cell>
          <table:table-cell table:style-name="ce11" office:value-type="string" ns42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, decay1, level2, decay2, sustain, release</text:p>
          </table:table-cell>
          <table:table-cell table:style-name="ce11" office:value-type="string" ns42:value-type="string" table:number-columns-spanned="1" table:number-rows-spanned="2">
            <text:p>attack-curve, decay-curve, release-curve</text:p>
          </table:table-cell>
          <table:table-cell table:style-name="ce11" office:value-type="string" ns42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1" office:value-type="string" ns42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ns42:value-type="string" table:number-columns-spanned="1" table:number-rows-spanned="2">
            <text:p>LowPass, HighPass, BandPass, Notch (from type)</text:p>
          </table:table-cell>
          <table:table-cell table:style-name="ce5" office:value-type="string" ns42:value-type="string" table:number-columns-spanned="1" table:number-rows-spanned="2">
            <text:p>1, 2, 4 (from slope)</text:p>
          </table:table-cell>
          <table:table-cell table:style-name="ce5" office:value-type="string" ns42:value-type="string" table:number-columns-spanned="1" table:number-rows-spanned="2">
            <text:p>cutoff / freq</text:p>
          </table:table-cell>
          <table:table-cell table:style-name="ce5" office:value-type="string" ns42:value-type="string" table:number-columns-spanned="1" table:number-rows-spanned="2">
            <text:p>resonance / res</text:p>
          </table:table-cell>
          <table:table-cell table:style-name="ce11" office:value-type="string" ns42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ns42:value-type="string" table:number-columns-spanned="1" table:number-rows-spanned="2">
            <text:p>Vel → Filter 1 Freq</text:p>
          </table:table-cell>
          <table:table-cell table:style-name="ce11" office:value-type="string" ns42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Waldorf Qpat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11" office:value-type="string" ns42:value-type="string" table:number-columns-spanned="1" table:number-rows-spanned="2">
            <text:p>Tag 1-4</text:p>
          </table:table-cell>
          <table:table-cell table:style-name="ce11" office:value-type="string" ns42:value-type="string" table:number-columns-spanned="1" table:number-rows-spanned="2">
            <text:p>Author</text:p>
          </table:table-cell>
          <table:table-cell table:style-name="ce17" office:value-type="string" ns42:value-type="string">
            <text:p>from file</text:p>
          </table:table-cell>
          <table:table-cell table:style-name="ce17" office:value-type="string" ns42:value-type="string">
            <text:p>Bank</text:p>
          </table:table-cell>
          <table:table-cell table:style-name="ce11" office:value-type="string" ns42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 table:number-columns-spanned="1" table:number-rows-spanned="2">
            <text:p>Sample-Map</text:p>
          </table:table-cell>
          <table:table-cell table:style-name="ce11" office:value-type="string" ns42:value-type="string" table:number-columns-spanned="1" table:number-rows-spanned="2">
            <text:p>Sample-Map: Pitch</text:p>
          </table:table-cell>
          <table:table-cell table:style-name="ce11" office:value-type="string" ns42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ample-Map: Start</text:p>
          </table:table-cell>
          <table:table-cell table:style-name="ce11" office:value-type="string" ns42:value-type="string" table:number-columns-spanned="1" table:number-rows-spanned="2">
            <text:p>Sample-Map: End</text:p>
          </table:table-cell>
          <table:table-cell table:style-name="ce11" office:value-type="string" ns42:value-type="string" table:number-columns-spanned="1" table:number-rows-spanned="2">
            <text:p>Sample-Map: Pitch</text:p>
          </table:table-cell>
          <table:table-cell table:style-name="ce11" office:value-type="string" ns42:value-type="string" table:number-columns-spanned="1" table:number-rows-spanned="2">
            <text:p>Sample-Map: TrackPitch / OscXKeytrack</text:p>
          </table:table-cell>
          <table:table-cell table:style-name="ce11" office:value-type="string" ns42:value-type="string" table:number-columns-spanned="1" table:number-rows-spanned="2">
            <text:p>Sample-Map: Direction</text:p>
          </table:table-cell>
          <table:table-cell table:style-name="ce11" office:value-type="string" ns42:value-type="string" table:number-columns-spanned="1" table:number-rows-spanned="2">
            <text:p>Sample-Map: Gain</text:p>
          </table:table-cell>
          <table:table-cell table:style-name="ce11" office:value-type="string" ns42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-Map: Type</text:p>
          </table:table-cell>
          <table:table-cell table:style-name="ce11" office:value-type="string" ns42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Sample-Map: LoopStart</text:p>
          </table:table-cell>
          <table:table-cell table:style-name="ce11" office:value-type="string" ns42:value-type="string" table:number-columns-spanned="1" table:number-rows-spanned="2">
            <text:p>Sample-Map: LoopEnd</text:p>
          </table:table-cell>
          <table:table-cell table:style-name="ce11" office:value-type="string" ns42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ns42:value-type="string" table:number-columns-spanned="1" table:number-rows-spanned="2">
            <text:p>AmpAttackCurve, AmpDecayCurve, AmpReleaseCurve</text:p>
          </table:table-cell>
          <table:table-cell table:style-name="ce11" office:value-type="string" ns42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ns42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ns42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ns42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ns42:value-type="string" table:number-columns-spanned="1" table:number-rows-spanned="2">
            <text:p>FilterState</text:p>
          </table:table-cell>
          <table:table-cell table:style-name="ce17" office:value-type="string" ns42:value-type="string" table:number-columns-spanned="1" table:number-rows-spanned="2">
            <text:p>Filter12Type: Lowpass</text:p>
          </table:table-cell>
          <table:table-cell table:style-name="ce11" office:value-type="string" ns42:value-type="string" table:number-columns-spanned="1" table:number-rows-spanned="2">
            <text:p>Filter12Type: 2, 4</text:p>
          </table:table-cell>
          <table:table-cell table:style-name="ce5" office:value-type="string" ns42:value-type="string" table:number-columns-spanned="1" table:number-rows-spanned="2">
            <text:p>Filter1CutOff</text:p>
          </table:table-cell>
          <table:table-cell table:style-name="ce5" office:value-type="string" ns42:value-type="string" table:number-columns-spanned="1" table:number-rows-spanned="2">
            <text:p>Filter1Reso</text:p>
          </table:table-cell>
          <table:table-cell table:style-name="ce11" office:value-type="string" ns42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ns42:value-type="string" table:number-columns-spanned="1" table:number-rows-spanned="2">
            <text:p>Filter1VeloAmount</text:p>
          </table:table-cell>
          <table:table-cell table:style-name="ce11" office:value-type="string" ns42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ns42:value-type="string" table:number-columns-spanned="1" table:number-rows-spanned="2">
            <text:p>WAV</text:p>
          </table:table-cell>
          <table:table-cell table:style-name="ce68" office:value-type="string" ns42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7" office:value-type="string" ns42:value-type="string">
            <text:p>from file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ns42:value-type="string">
            <text:p>SMPL/INST-Chunk/calculated</text:p>
          </table:table-cell>
          <table:table-cell table:style-name="ce5" office:value-type="string" ns42:value-type="string">
            <text:p>MIDI Unity Note / filename</text:p>
          </table:table-cell>
          <table:table-cell table:style-name="ce5" office:value-type="string" ns42:value-type="string">
            <text:p>keyrangebottom / keyrangetop / calc.</text:p>
          </table:table-cell>
          <table:table-cell table:style-name="ce23"/>
          <table:table-cell table:style-name="ce5" office:value-type="string" ns42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ns42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SMPL-Chunk</text:p>
          </table:table-cell>
          <table:table-cell table:style-name="ce5" office:value-type="string" ns42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ns42:value-type="string">
            <text:p>INST-Chunk</text:p>
          </table:table-cell>
          <table:table-cell table:style-name="ce5" office:value-type="string" ns42:value-type="string">
            <text:p>rootnote</text:p>
          </table:table-cell>
          <table:table-cell table:style-name="ce5" office:value-type="string" ns42:value-type="string">
            <text:p>keyrangebottom / keyrangetop</text:p>
          </table:table-cell>
          <table:table-cell table:style-name="ce23"/>
          <table:table-cell table:style-name="ce5" office:value-type="string" ns42:value-type="string">
            <text:p>velrangebottom / velrangetop</text:p>
          </table:table-cell>
          <table:table-cell table:style-name="ce23" table:number-columns-repeated="3"/>
          <table:table-cell table:style-name="ce5" office:value-type="string" ns42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9">
          <table:table-cell table:style-name="ce6" office:value-type="string" ns42:value-type="string" table:number-columns-spanned="1" table:number-rows-spanned="2">
            <text:p>Yamaha YSFC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x7u/x7l/x8u/x8l</text:p>
          </table:table-cell>
          <table:table-cell table:style-name="ce11" office:value-type="string" ns42:value-type="string" table:number-columns-spanned="1" table:number-rows-spanned="2">
            <text:p>x7u/x7l/x8u/x8l</text:p>
          </table:table-cell>
          <table:table-cell table:style-name="ce10" office:value-type="string" ns42:value-type="string">
            <text:p>x7u/x7l/x8u/x8l</text:p>
          </table:table-cell>
          <table:table-cell table:style-name="ce17" office:value-type="float" office:value="16" ns42:value-type="float">
            <text:p>16</text:p>
          </table:table-cell>
          <table:table-cell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7" office:value-type="string" ns42:value-type="string">
            <text:p>from filename</text:p>
          </table:table-cell>
          <table:table-cell table:style-name="ce10" office:value-type="string" ns42:value-type="string">
            <text:p>Part of sample/performance* 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0" office:value-type="string" ns42:value-type="string">
            <text:p>BEXT chunk: originationDate/Time</text:p>
          </table:table-cell>
          <table:table-cell table:style-name="ce10" office:value-type="string" ns42:value-type="string">
            <text:p>BEXT chunk: description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ns42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ns42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Element : XA Control</text:p>
          </table:table-cell>
          <table:table-cell table:style-name="ce5" office:value-type="string" ns42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ns42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ns42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Part:PitchBendRangeUpper</text:p>
          </table:table-cell>
          <table:table-cell table:style-name="ce5" office:value-type="string" ns42:value-type="string" table:number-columns-spanned="1" table:number-rows-spanned="2">
            <text:p>Part:PitchBendRangeLower</text:p>
          </table:table-cell>
          <table:table-cell table:style-name="ce5" office:value-type="string" ns42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Element:FilterType</text:p>
          </table:table-cell>
          <table:table-cell table:style-name="ce5" office:value-type="string" ns42:value-type="string" table:number-columns-spanned="1" table:number-rows-spanned="2">
            <text:p>Element:FilterType</text:p>
          </table:table-cell>
          <table:table-cell table:style-name="ce5" office:value-type="string" ns42:value-type="string" table:number-columns-spanned="1" table:number-rows-spanned="2">
            <text:p>Element:FilterCutoffFrequency</text:p>
          </table:table-cell>
          <table:table-cell table:style-name="ce5" office:value-type="string" ns42:value-type="string" table:number-columns-spanned="1" table:number-rows-spanned="2">
            <text:p>Element:FilterResonance</text:p>
          </table:table-cell>
          <table:table-cell table:style-name="ce5" office:value-type="string" ns42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ns42:value-type="string" table:number-columns-spanned="1" table:number-rows-spanned="2">
            <text:p>Element:FegLevelVelocitySensitivity</text:p>
          </table:table-cell>
          <table:table-cell table:style-name="ce5" office:value-type="string" ns42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6">
          <table:covered-table-cell table:style-name="ce4"/>
          <table:table-cell table:style-name="ce68" office:value-type="string" ns42:value-type="string">
            <text:p>Write**</text:p>
          </table:table-cell>
          <table:covered-table-cell table:number-columns-repeated="2" table:style-name="ce4"/>
          <table:table-cell table:style-name="ce15" office:value-type="string" ns42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ns42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5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M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.00.0000</text:date>, <text:time style:data-style-name="N2" text:time-value="22:39:29.672978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1-03-31T19:20:13Z</meta:creation-date>
    <dc:date>2026-07-11T23:10:17.985175100</dc:date>
    <meta:editing-cycles>957</meta:editing-cycles>
    <meta:editing-duration>P1DT13H15M42S</meta:editing-duration>
    <meta:document-statistic meta:table-count="1" meta:cell-count="1440" meta:object-count="0"/>
    <meta:generator>ODFPY/1.4.1</meta:generator>
  </office:meta>
</office:document-meta>
</file>