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769cm" fo:break-before="auto" style:use-optimal-row-height="false"/>
    </style:style>
    <style:style style:name="ro9" style:family="table-row">
      <style:table-row-properties style:row-height="0.707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number-columns-repeated="2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Default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/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Default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6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Default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Default" table:number-columns-repeated="1632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Default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Default" table:number-columns-repeated="16324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  <table:table-cell table:style-name="Default" table:number-columns-repeated="16324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  <table:table-cell table:style-name="Default" table:number-columns-repeated="16324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Default" table:number-columns-repeated="16324"/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Default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3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Default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Default"/>
          <table:table-cell table:style-name="ce67" table:number-columns-repeated="16323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Default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Default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Default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  <table:table-cell table:style-name="Default" table:number-columns-repeated="16324"/>
        </table:table-row>
        <table:table-row table:style-name="ro4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/>
          <table:table-cell table:style-name="Default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/>
          <table:table-cell table:style-name="Default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Default"/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/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/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Default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Default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Default"/>
          <table:table-cell table:style-name="ce67" table:number-columns-repeated="16323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1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Default"/>
          <table:table-cell table:style-name="ce67" table:number-columns-repeated="16323"/>
        </table:table-row>
        <table:table-row table:style-name="ro14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Default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7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.00.0000</text:date>, <text:time style:data-style-name="N2" text:time-value="11:57:03.240039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5T12:28:46.327137200</dc:date>
    <meta:editing-cycles>917</meta:editing-cycles>
    <meta:editing-duration>P1DT5M35S</meta:editing-duration>
    <meta:document-statistic meta:table-count="1" meta:cell-count="1391" meta:object-count="0"/>
  </office:meta>
</office:document-meta>
</file>