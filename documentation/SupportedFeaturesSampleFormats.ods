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1.034cm" fo:break-before="auto" style:use-optimal-row-height="fals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11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20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ce11" office:value-type="string" calcext:value-type="string" table:number-columns-spanned="1" table:number-rows-spanned="2">
            <text:p>flt1_kbd_trk</text:p>
          </table:table-cell>
          <table:table-cell table:style-name="Default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  <table:table-cell table:style-name="Default" table:number-columns-repeated="163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  <table:table-cell table:style-name="Default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  <table:table-cell table:style-name="Default" table:number-columns-repeated="16323"/>
        </table:table-row>
        <table:table-row table:style-name="ro6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  <table:table-cell table:style-name="Default" table:number-columns-repeated="16323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  <table:table-cell table:style-name="Default" table:number-columns-repeated="16323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76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5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Default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Default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Default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Default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Default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Default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  <table:table-cell table:style-name="Default" table:number-columns-repeated="16324"/>
        </table:table-row>
        <table:table-row table:style-name="ro5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/>
          <table:table-cell table:style-name="Default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/>
          <table:table-cell table:style-name="Default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Default"/>
          <table:table-cell table:style-name="ce67" table:number-columns-repeated="16323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5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/>
          <table:table-cell table:style-name="Default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/>
          <table:table-cell table:style-name="Default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Default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Default"/>
          <table:table-cell table:style-name="ce67" table:number-columns-repeated="16323"/>
        </table:table-row>
        <table:table-row table:style-name="ro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Default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Default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3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1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Default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Default"/>
          <table:table-cell table:style-name="ce67" table:number-columns-repeated="16323"/>
        </table:table-row>
        <table:table-row table:style-name="ro5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Default"/>
          <table:table-cell table:style-name="ce67" table:number-columns-repeated="16323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5" table:number-rows-repeated="1048507">
          <table:table-cell table:number-columns-repeated="61"/>
          <table:table-cell table:style-name="ce67" table:number-columns-repeated="16323"/>
        </table:table-row>
        <table:table-row table:style-name="ro5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.00.0000</text:date>, <text:time style:data-style-name="N2" text:time-value="13:54:44.759293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5T17:42:06.063057600</dc:date>
    <meta:editing-cycles>934</meta:editing-cycles>
    <meta:editing-duration>P1DT3H52M48S</meta:editing-duration>
    <meta:document-statistic meta:table-count="1" meta:cell-count="1400" meta:object-count="0"/>
  </office:meta>
</office:document-meta>
</file>