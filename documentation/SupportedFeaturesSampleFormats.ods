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fo="urn:oasis:names:tc:opendocument:xmlns:xsl-fo-compatible:1.0" xmlns:form="urn:oasis:names:tc:opendocument:xmlns:form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3" table:default-cell-style-name="ce69"/>
        <table:table-column table:style-name="co6" table:default-cell-style-name="ce69"/>
        <table:table-column table:style-name="co6" table:default-cell-style-name="ce69"/>
        <table:table-column table:style-name="co14" table:default-cell-style-name="ce69"/>
        <table:table-column table:style-name="co14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default-cell-style-name="ce69"/>
        <table:table-column table:style-name="co6" table:default-cell-style-name="ce69"/>
        <table:table-column table:style-name="co6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default-cell-style-name="ce69"/>
        <table:table-column table:style-name="co6" table:default-cell-style-name="ce69"/>
        <table:table-column table:style-name="co6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6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6" table:number-columns-repeated="16323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13" office:value-type="string" calcext:value-type="string">
            <text:p>samtrigtype</text:p>
          </table:table-cell>
          <table:table-cell table:style-name="ce13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3" office:value-type="string" calcext:value-type="string">
            <text:p>samtrigtype</text:p>
          </table:table-cell>
          <table:table-cell table:style-name="ce13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6"/>
          <table:table-cell table:style-name="ce72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72"/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23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13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72"/>
          <table:table-cell table:style-name="ce7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3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13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6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Pad exclusive group</text:p>
          </table:table-cell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13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6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6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6" office:value-type="string" calcext:value-type="string">
            <text:p>TODO unknown where </text:p>
            <text:p>stored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6" office:value-type="string" calcext:value-type="string">
            <text:p>TODO unknown where </text:p>
            <text:p>stored</text:p>
          </table:table-cell>
          <table:table-cell table:style-name="ce26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13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23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13" office:value-type="string" calcext:value-type="string">
            <text:p>Key to volume</text:p>
          </table:table-cell>
          <table:table-cell table:style-name="ce13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13" office:value-type="string" calcext:value-type="string">
            <text:p>Group volume / pan / tuning</text:p>
          </table:table-cell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/>
          <table:table-cell table:style-name="ce72"/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/>
          <table:table-cell table:style-name="ce72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21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72"/>
          <table:table-cell table:style-name="ce13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3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6" office:value-type="string" calcext:value-type="string">
            <text:p>CONN_SRC_PITCHWHEEL → CONN_DST_PITCH</text:p>
          </table:table-cell>
          <table:table-cell table:style-name="ce26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/>
          <table:table-cell table:style-name="ce72"/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21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72"/>
          <table:table-cell table:style-name="ce72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6"/>
          <table:table-cell table:style-name="ce72"/>
          <table:table-cell table:style-name="ce26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3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13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/>
          <table:table-cell table:style-name="ce7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6" office:value-type="string" calcext:value-type="string">
            <text:p>velocity</text:p>
          </table:table-cell>
          <table:table-cell table:style-name="ce72"/>
          <table:table-cell table:style-name="ce13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23"/>
          <table:table-cell table:number-columns-repeated="2" table:style-name="ce26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6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72"/>
          <table:table-cell table:style-name="ce7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3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3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3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13" office:value-type="string" calcext:value-type="string">
            <text:p>Volume key scale</text:p>
          </table:table-cell>
          <table:table-cell table:style-name="ce13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20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26" office:value-type="string" calcext:value-type="string">
            <text:p>from tuning</text:p>
          </table:table-cell>
          <table:table-cell table:style-name="ce26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6"/>
          <table:table-cell table:style-name="ce72"/>
          <table:table-cell table:style-name="ce72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7"/>
          <table:table-cell table:style-name="ce23" table:number-columns-repeated="3"/>
          <table:table-cell table:style-name="ce72"/>
          <table:table-cell table:style-name="ce87"/>
          <table:table-cell table:style-name="ce23" table:number-columns-repeated="6"/>
          <table:table-cell table:style-name="ce20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13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13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3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/>
          <table:table-cell table:style-name="ce7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/>
          <table:table-cell table:style-name="ce72"/>
          <table:table-cell table:style-name="ce4"/>
          <table:table-cell table:style-name="ce21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3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/>
          <table:table-cell table:style-name="ce7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/>
          <table:table-cell table:style-name="ce7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/>
          <table:table-cell table:style-name="ce7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72"/>
          <table:table-cell table:style-name="ce7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table-cell table:style-name="ce7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3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13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3" office:value-type="string" calcext:value-type="string">
            <text:p>OneShotTrigger</text:p>
          </table:table-cell>
          <table:table-cell table:style-name="ce13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13" office:value-type="string" calcext:value-type="string">
            <text:p>OneShotTrigger</text:p>
          </table:table-cell>
          <table:table-cell table:style-name="ce13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13" office:value-type="string" calcext:value-type="string">
            <text:p>Play mode (one-shot)</text:p>
          </table:table-cell>
          <table:table-cell table:style-name="ce13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21" office:value-type="string" calcext:value-type="string">
            <text:p>TVA Velocity Curve</text:p>
          </table:table-cell>
          <table:table-cell table:style-name="ce13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13" office:value-type="string" calcext:value-type="string">
            <text:p>Play mode (one-shot)</text:p>
          </table:table-cell>
          <table:table-cell table:style-name="ce13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13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13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6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13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21" office:value-type="string" calcext:value-type="string">
            <text:p>Velocity Curve Type</text:p>
          </table:table-cell>
          <table:table-cell table:style-name="ce13" office:value-type="string" calcext:value-type="string">
            <text:p>TVA level key follow</text:p>
          </table:table-cell>
          <table:table-cell table:style-name="ce13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23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/>
          <table:table-cell table:style-name="ce21" office:value-type="string" calcext:value-type="string">
            <text:p>Partial velocity range (up to 4 layers)</text:p>
          </table:table-cell>
          <table:table-cell table:style-name="ce23" table:number-columns-repeated="2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23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72"/>
          <table:table-cell table:style-name="ce13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72"/>
          <table:table-cell table:style-name="ce13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72"/>
          <table:table-cell table:style-name="ce13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1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3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3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3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3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13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13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13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13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72"/>
          <table:table-cell table:style-name="ce13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3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13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13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23"/>
          <table:table-cell table:style-name="ce21"/>
          <table:covered-table-cell table:style-name="ce4"/>
          <table:table-cell table:style-name="ce81"/>
          <table:table-cell table:style-name="ce72"/>
          <table:table-cell table:style-name="ce23"/>
          <table:table-cell table:style-name="ce13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3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3" office:value-type="string" calcext:value-type="string">
            <text:p>levelKeyFollowSensitivity</text:p>
          </table:table-cell>
          <table:table-cell table:style-name="ce13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13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13" office:value-type="string" calcext:value-type="string">
            <text:p>levelKeyFollowSensitivity</text:p>
          </table:table-cell>
          <table:table-cell table:style-name="ce13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0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.00.0000</text:date>, <text:time style:data-style-name="N2" text:time-value="10:38:11.333526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18T10:52:00.672729500</dc:date>
    <meta:editing-cycles>964</meta:editing-cycles>
    <meta:editing-duration>P1DT13H34M58S</meta:editing-duration>
    <meta:generator>LibreOffice/26.2.4.2$Windows_X86_64 LibreOffice_project/0229ac93fcf0d7cbc6376066c6f35021cef002dc</meta:generator>
    <meta:document-statistic meta:table-count="1" meta:cell-count="1534" meta:object-count="0"/>
  </office:meta>
</office:document-meta>
</file>